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CE6065AF3E8D4315885B66A50FC035FB.jpg" manifest:media-type="image/jpeg"/>
  <manifest:file-entry manifest:full-path="Pictures/6D6F21DC967A4D0A90D1D0B3EB443BCC.jpg" manifest:media-type="image/jpeg"/>
  <manifest:file-entry manifest:full-path="Pictures/A0F0F996A4A841508E40C9E5D6D03773.jpg" manifest:media-type="image/jpeg"/>
  <manifest:file-entry manifest:full-path="Pictures/08A077814E534C8CBAF012C3B9E91047.jpg" manifest:media-type="image/jpeg"/>
  <manifest:file-entry manifest:full-path="Pictures/243AA51655F54963950322757F884811.jpg" manifest:media-type="image/jpeg"/>
  <manifest:file-entry manifest:full-path="Pictures/E842CFD2E90D4135BC5280232A9BDEA8.jpg" manifest:media-type="image/jpeg"/>
  <manifest:file-entry manifest:full-path="Pictures/384F553BC334485BA9EC81565C7A8420.jpg" manifest:media-type="image/jpeg"/>
  <manifest:file-entry manifest:full-path="Pictures/7C4FAE22A0E44E8E94A1E9A11A177782.jpg" manifest:media-type="image/jpeg"/>
  <manifest:file-entry manifest:full-path="Pictures/B8633F60F6554807B7AA0BB78B80C595.jpg" manifest:media-type="image/jpeg"/>
  <manifest:file-entry manifest:full-path="Pictures/A2212F7C641B499CBACAD94A84A73F88.jpg" manifest:media-type="image/jpeg"/>
  <manifest:file-entry manifest:full-path="Pictures/2CFCDF9F39D449CA85EEBB44A7974563.jpg" manifest:media-type="image/jpeg"/>
  <manifest:file-entry manifest:full-path="Pictures/780BA540781446A3B6E1E793F3C268F2.jpg" manifest:media-type="image/jpeg"/>
  <manifest:file-entry manifest:full-path="Pictures/18BECA5175EC4719805A9C12916F7B57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Noto Sans CJK JP" svg:font-family="'Noto Sans CJK JP'" style:font-family-generic="swiss" style:font-pitch="variable"/>
  </office:font-face-decls>
  <office:automatic-styles>
    <style:style style:name="Frame" style:family="graphic" style:display-name="Frame">
      <style:graphic-properties draw:fill="none" draw:stroke="none"/>
    </style:style>
    <style:style style:name="PageWhite" style:family="graphic" style:display-name="PageWhite">
      <style:graphic-properties draw:fill="solid" draw:stroke="none" draw:fill-color="#FFFFFF"/>
    </style:style>
    <style:style style:name="PageWarm" style:family="graphic" style:display-name="PageWarm">
      <style:graphic-properties draw:fill="solid" draw:stroke="none" draw:fill-color="#F5F1EA"/>
    </style:style>
    <style:style style:name="PaleFill" style:family="graphic" style:display-name="PaleFill">
      <style:graphic-properties draw:fill="solid" draw:stroke="none" draw:fill-color="#EDF1EB"/>
    </style:style>
    <style:style style:name="WhiteFill" style:family="graphic" style:display-name="WhiteFill">
      <style:graphic-properties draw:fill="solid" draw:stroke="none" draw:fill-color="#FFFFFF"/>
    </style:style>
    <style:style style:name="GoldFill" style:family="graphic" style:display-name="GoldFill">
      <style:graphic-properties draw:fill="solid" draw:stroke="none" draw:fill-color="#B8924B"/>
    </style:style>
    <style:style style:name="Rule" style:family="graphic" style:display-name="Rule">
      <style:graphic-properties draw:fill="none" draw:stroke="solid" svg:stroke-color="#46624F" svg:stroke-width="0.8pt"/>
    </style:style>
    <style:style style:name="Hairline" style:family="graphic" style:display-name="Hairline">
      <style:graphic-properties draw:fill="none" draw:stroke="solid" svg:stroke-color="#D7DDD8" svg:stroke-width="0.5pt"/>
    </style:style>
    <style:style style:name="ImageFrame" style:family="graphic" style:display-name="ImageFrame">
      <style:graphic-properties draw:fill="none" draw:stroke="solid" svg:stroke-color="#FFFFFF" svg:stroke-width="1.2pt"/>
    </style:style>
    <style:style style:name="Kicker" style:family="paragraph" style:display-name="Kicker">
      <style:paragraph-properties fo:text-align="left" fo:margin-top="0in" fo:margin-bottom="0in" fo:line-height="120%"/>
      <style:text-properties style:font-name="Noto Sans CJK JP" style:font-name-asian="Noto Sans CJK JP" fo:font-family="'Noto Sans CJK JP'" style:font-family-asian="'Noto Sans CJK JP'" fo:font-size="8.5pt" style:font-size-asian="8.5pt" fo:font-weight="bold" style:font-weight-asian="bold" fo:color="#46624F" fo:language="ja" fo:country="JP" style:language-asian="ja" style:country-asian="JP"/>
    </style:style>
    <style:style style:name="Title" style:family="paragraph" style:display-name="Title">
      <style:paragraph-properties fo:text-align="left" fo:margin-top="0in" fo:margin-bottom="0in" fo:line-height="115%"/>
      <style:text-properties style:font-name="Noto Sans CJK JP" style:font-name-asian="Noto Sans CJK JP" fo:font-family="'Noto Sans CJK JP'" style:font-family-asian="'Noto Sans CJK JP'" fo:font-size="28pt" style:font-size-asian="28pt" fo:font-weight="bold" style:font-weight-asian="bold" fo:color="#27302C" fo:language="ja" fo:country="JP" style:language-asian="ja" style:country-asian="JP"/>
    </style:style>
    <style:style style:name="PageTitle" style:family="paragraph" style:display-name="PageTitle">
      <style:paragraph-properties fo:text-align="left" fo:margin-top="0in" fo:margin-bottom="0in" fo:line-height="120%"/>
      <style:text-properties style:font-name="Noto Sans CJK JP" style:font-name-asian="Noto Sans CJK JP" fo:font-family="'Noto Sans CJK JP'" style:font-family-asian="'Noto Sans CJK JP'" fo:font-size="20pt" style:font-size-asian="20pt" fo:font-weight="bold" style:font-weight-asian="bold" fo:color="#27302C" fo:language="ja" fo:country="JP" style:language-asian="ja" style:country-asian="JP"/>
    </style:style>
    <style:style style:name="Head" style:family="paragraph" style:display-name="Head">
      <style:paragraph-properties fo:text-align="left" fo:margin-top="0in" fo:margin-bottom="0in" fo:line-height="125%"/>
      <style:text-properties style:font-name="Noto Sans CJK JP" style:font-name-asian="Noto Sans CJK JP" fo:font-family="'Noto Sans CJK JP'" style:font-family-asian="'Noto Sans CJK JP'" fo:font-size="14pt" style:font-size-asian="14pt" fo:font-weight="bold" style:font-weight-asian="bold" fo:color="#46624F" fo:language="ja" fo:country="JP" style:language-asian="ja" style:country-asian="JP"/>
    </style:style>
    <style:style style:name="Subhead" style:family="paragraph" style:display-name="Subhead">
      <style:paragraph-properties fo:text-align="left" fo:margin-top="0in" fo:margin-bottom="0in" fo:line-height="130%"/>
      <style:text-properties style:font-name="Noto Sans CJK JP" style:font-name-asian="Noto Sans CJK JP" fo:font-family="'Noto Sans CJK JP'" style:font-family-asian="'Noto Sans CJK JP'" fo:font-size="11pt" style:font-size-asian="11pt" fo:font-weight="bold" style:font-weight-asian="bold" fo:color="#27302C" fo:language="ja" fo:country="JP" style:language-asian="ja" style:country-asian="JP"/>
    </style:style>
    <style:style style:name="Body" style:family="paragraph" style:display-name="Body">
      <style:paragraph-properties fo:text-align="left" fo:margin-top="0in" fo:margin-bottom="0in" fo:line-height="155%"/>
      <style:text-properties style:font-name="Noto Sans CJK JP" style:font-name-asian="Noto Sans CJK JP" fo:font-family="'Noto Sans CJK JP'" style:font-family-asian="'Noto Sans CJK JP'" fo:font-size="9.2pt" style:font-size-asian="9.2pt" fo:font-weight="normal" style:font-weight-asian="normal" fo:color="#27302C" fo:language="ja" fo:country="JP" style:language-asian="ja" style:country-asian="JP"/>
    </style:style>
    <style:style style:name="BodyDense" style:family="paragraph" style:display-name="BodyDense">
      <style:paragraph-properties fo:text-align="left" fo:margin-top="0in" fo:margin-bottom="0in" fo:line-height="148%"/>
      <style:text-properties style:font-name="Noto Sans CJK JP" style:font-name-asian="Noto Sans CJK JP" fo:font-family="'Noto Sans CJK JP'" style:font-family-asian="'Noto Sans CJK JP'" fo:font-size="8.25pt" style:font-size-asian="8.25pt" fo:font-weight="normal" style:font-weight-asian="normal" fo:color="#27302C" fo:language="ja" fo:country="JP" style:language-asian="ja" style:country-asian="JP"/>
    </style:style>
    <style:style style:name="BodyTiny" style:family="paragraph" style:display-name="BodyTiny">
      <style:paragraph-properties fo:text-align="left" fo:margin-top="0in" fo:margin-bottom="0in" fo:line-height="142%"/>
      <style:text-properties style:font-name="Noto Sans CJK JP" style:font-name-asian="Noto Sans CJK JP" fo:font-family="'Noto Sans CJK JP'" style:font-family-asian="'Noto Sans CJK JP'" fo:font-size="7.55pt" style:font-size-asian="7.55pt" fo:font-weight="normal" style:font-weight-asian="normal" fo:color="#27302C" fo:language="ja" fo:country="JP" style:language-asian="ja" style:country-asian="JP"/>
    </style:style>
    <style:style style:name="BodySmall" style:family="paragraph" style:display-name="BodySmall">
      <style:paragraph-properties fo:text-align="left" fo:margin-top="0in" fo:margin-bottom="0in" fo:line-height="145%"/>
      <style:text-properties style:font-name="Noto Sans CJK JP" style:font-name-asian="Noto Sans CJK JP" fo:font-family="'Noto Sans CJK JP'" style:font-family-asian="'Noto Sans CJK JP'" fo:font-size="8.2pt" style:font-size-asian="8.2pt" fo:font-weight="normal" style:font-weight-asian="normal" fo:color="#27302C" fo:language="ja" fo:country="JP" style:language-asian="ja" style:country-asian="JP"/>
    </style:style>
    <style:style style:name="Caption" style:family="paragraph" style:display-name="Caption">
      <style:paragraph-properties fo:text-align="left" fo:margin-top="0in" fo:margin-bottom="0in" fo:line-height="125%"/>
      <style:text-properties style:font-name="Noto Sans CJK JP" style:font-name-asian="Noto Sans CJK JP" fo:font-family="'Noto Sans CJK JP'" style:font-family-asian="'Noto Sans CJK JP'" fo:font-size="7.2pt" style:font-size-asian="7.2pt" fo:font-weight="normal" style:font-weight-asian="normal" fo:color="#6E756F" fo:language="ja" fo:country="JP" style:language-asian="ja" style:country-asian="JP"/>
    </style:style>
    <style:style style:name="Small" style:family="paragraph" style:display-name="Small">
      <style:paragraph-properties fo:text-align="left" fo:margin-top="0in" fo:margin-bottom="0in" fo:line-height="125%"/>
      <style:text-properties style:font-name="Noto Sans CJK JP" style:font-name-asian="Noto Sans CJK JP" fo:font-family="'Noto Sans CJK JP'" style:font-family-asian="'Noto Sans CJK JP'" fo:font-size="7.2pt" style:font-size-asian="7.2pt" fo:font-weight="normal" style:font-weight-asian="normal" fo:color="#6E756F" fo:language="ja" fo:country="JP" style:language-asian="ja" style:country-asian="JP"/>
    </style:style>
    <style:style style:name="Quote" style:family="paragraph" style:display-name="Quote">
      <style:paragraph-properties fo:text-align="left" fo:margin-top="0in" fo:margin-bottom="0in" fo:line-height="138%"/>
      <style:text-properties style:font-name="Noto Sans CJK JP" style:font-name-asian="Noto Sans CJK JP" fo:font-family="'Noto Sans CJK JP'" style:font-family-asian="'Noto Sans CJK JP'" fo:font-size="15pt" style:font-size-asian="15pt" fo:font-weight="bold" style:font-weight-asian="bold" fo:color="#46624F" fo:language="ja" fo:country="JP" style:language-asian="ja" style:country-asian="JP"/>
    </style:style>
    <style:style style:name="Number" style:family="paragraph" style:display-name="Number">
      <style:paragraph-properties fo:text-align="center" fo:margin-top="0in" fo:margin-bottom="0in" fo:line-height="110%"/>
      <style:text-properties style:font-name="Noto Sans CJK JP" style:font-name-asian="Noto Sans CJK JP" fo:font-family="'Noto Sans CJK JP'" style:font-family-asian="'Noto Sans CJK JP'" fo:font-size="24pt" style:font-size-asian="24pt" fo:font-weight="bold" style:font-weight-asian="bold" fo:color="#B8924B" fo:language="ja" fo:country="JP" style:language-asian="ja" style:country-asian="JP"/>
    </style:style>
    <style:style style:name="Center" style:family="paragraph" style:display-name="Center">
      <style:paragraph-properties fo:text-align="center" fo:margin-top="0in" fo:margin-bottom="0in" fo:line-height="125%"/>
      <style:text-properties style:font-name="Noto Sans CJK JP" style:font-name-asian="Noto Sans CJK JP" fo:font-family="'Noto Sans CJK JP'" style:font-family-asian="'Noto Sans CJK JP'" fo:font-size="9pt" style:font-size-asian="9pt" fo:font-weight="bold" style:font-weight-asian="bold" fo:color="#27302C" fo:language="ja" fo:country="JP" style:language-asian="ja" style:country-asian="JP"/>
    </style:style>
    <style:style style:name="QAQuestion" style:family="paragraph" style:display-name="QAQuestion">
      <style:paragraph-properties fo:text-align="left" fo:margin-top="0in" fo:margin-bottom="0in" fo:line-height="135%"/>
      <style:text-properties style:font-name="Noto Sans CJK JP" style:font-name-asian="Noto Sans CJK JP" fo:font-family="'Noto Sans CJK JP'" style:font-family-asian="'Noto Sans CJK JP'" fo:font-size="11pt" style:font-size-asian="11pt" fo:font-weight="bold" style:font-weight-asian="bold" fo:color="#46624F" fo:language="ja" fo:country="JP" style:language-asian="ja" style:country-asian="JP"/>
    </style:style>
  </office:automatic-styles>
  <office:body>
    <office:drawing>
      <draw:page draw:name="01-cover" draw:master-page-name="NewsletterMaster" draw:style-name="PageWhite">
        <draw:frame draw:style-name="Frame" draw:name="cover-photo" svg:x="0.0000in" svg:y="0.0000in" svg:width="8.2677in" svg:height="3.5500in">
          <draw:image xlink:href="Pictures/CE6065AF3E8D4315885B66A50FC035FB.jpg" xlink:type="simple" xlink:show="embed" xlink:actuate="onLoad"/>
        </draw:frame>
        <draw:rect draw:style-name="WhiteFill" draw:name="cover-title-band" svg:x="0.0000in" svg:y="3.5500in" svg:width="8.2677in" svg:height="1.7600in"/>
        <draw:frame draw:style-name="Frame" draw:name="cover-kicker" svg:x="0.7000in" svg:y="3.8200in" svg:width="3.2000in" svg:height="0.2400in">
          <draw:text-box>
            <text:p text:style-name="Kicker">地域・施設・教室のための会報</text:p>
          </draw:text-box>
        </draw:frame>
        <draw:frame draw:style-name="Frame" draw:name="cover-title" svg:x="0.6700in" svg:y="4.1200in" svg:width="4.3000in" svg:height="0.5400in">
          <draw:text-box>
            <text:p text:style-name="Title">みどりの輪だより</text:p>
          </draw:text-box>
        </draw:frame>
        <draw:frame draw:style-name="Frame" draw:name="cover-issue" svg:x="5.4700in" svg:y="4.2400in" svg:width="2.1000in" svg:height="0.2800in">
          <draw:text-box>
            <text:p text:style-name="Center">第12号　2026年夏</text:p>
          </draw:text-box>
        </draw:frame>
        <draw:frame draw:style-name="Frame" draw:name="cover-caption" svg:x="0.7000in" svg:y="4.8600in" svg:width="6.9000in" svg:height="0.3200in">
          <draw:text-box>
            <text:p text:style-name="Caption">季節の景色とともに、地域の活動と次の予定をお届けします。</text:p>
          </draw:text-box>
        </draw:frame>
        <draw:line draw:style-name="Hairline" draw:name="cover-divider" svg:x1="4.1200in" svg:y1="5.5500in" svg:x2="4.1200in" svg:y2="10.5800in"/>
        <draw:frame draw:style-name="Frame" draw:name="greeting-1-portrait" svg:x="0.7000in" svg:y="5.7200in" svg:width="0.7800in" svg:height="0.9000in">
          <draw:image xlink:href="Pictures/6D6F21DC967A4D0A90D1D0B3EB443BCC.jpg" xlink:type="simple" xlink:show="embed" xlink:actuate="onLoad"/>
        </draw:frame>
        <draw:frame draw:style-name="Frame" draw:name="greeting-1-head" svg:x="1.6700in" svg:y="5.7600in" svg:width="1.8500in" svg:height="0.3200in">
          <draw:text-box>
            <text:p text:style-name="Head">代表より</text:p>
          </draw:text-box>
        </draw:frame>
        <draw:frame draw:style-name="Frame" draw:name="greeting-1-name" svg:x="1.6700in" svg:y="6.1700in" svg:width="2.1000in" svg:height="0.2400in">
          <draw:text-box>
            <text:p text:style-name="Small">みどりの輪 代表　山田 花子</text:p>
          </draw:text-box>
        </draw:frame>
        <draw:frame draw:style-name="Frame" draw:name="greeting-1-body" svg:x="0.7000in" svg:y="6.8000in" svg:width="3.0500in" svg:height="3.6200in">
          <draw:text-box>
            <text:p text:style-name="BodyDense">今年も、地域の皆さんと顔を合わせる機会を重ねることができました。小さな活動でも、そこで生まれた会話が次のつながりになります。今号では、初夏の交流会と庭づくりの様子を中心にご紹介します。</text:p>
            <text:p text:style-name="BodyDense"/>
            <text:p text:style-name="BodyDense">昨年度は、行事の参加者だけでなく、準備や片付けを手伝ってくださる方も増えました。短い時間でも関わる方法があることを伝えたことで、初めての方にも参加していただけたのだと思います。</text:p>
            <text:p text:style-name="BodyDense"/>
            <text:p text:style-name="BodyDense">これからも、無理なく関われて、久しぶりの方も気軽に戻ってこられる場所を、皆さんと一緒につくっていきます。</text:p>
          </draw:text-box>
        </draw:frame>
        <draw:frame draw:style-name="Frame" draw:name="greeting-2-portrait" svg:x="4.4800in" svg:y="5.7200in" svg:width="0.7800in" svg:height="0.9000in">
          <draw:image xlink:href="Pictures/A0F0F996A4A841508E40C9E5D6D03773.jpg" xlink:type="simple" xlink:show="embed" xlink:actuate="onLoad"/>
        </draw:frame>
        <draw:frame draw:style-name="Frame" draw:name="greeting-2-head" svg:x="5.4500in" svg:y="5.7600in" svg:width="1.8500in" svg:height="0.3200in">
          <draw:text-box>
            <text:p text:style-name="Head">編集担当より</text:p>
          </draw:text-box>
        </draw:frame>
        <draw:frame draw:style-name="Frame" draw:name="greeting-2-name" svg:x="5.4500in" svg:y="6.1700in" svg:width="2.1000in" svg:height="0.2400in">
          <draw:text-box>
            <text:p text:style-name="Small">広報担当　佐藤 一郎</text:p>
          </draw:text-box>
        </draw:frame>
        <draw:frame draw:style-name="Frame" draw:name="greeting-2-body" svg:x="4.4800in" svg:y="6.8000in" svg:width="3.0500in" svg:height="3.6200in">
          <draw:text-box>
            <text:p text:style-name="BodyDense">今号は、活動に参加できなかった方にも当日の空気が伝わるよう、写真と文章の両方を大切にしました。短い報告だけでなく、活動を始めた理由や、続ける中で見えてきた課題も掲載しています。</text:p>
            <text:p text:style-name="BodyDense"/>
            <text:p text:style-name="BodyDense">写真は、集合写真だけでなく、準備中の手元や会話の場面も選びました。小さな場面を残すことで、数字だけでは伝わらない雰囲気が見えてきます。</text:p>
            <text:p text:style-name="BodyDense"/>
            <text:p text:style-name="BodyDense">ご感想や掲載してほしい話題がありましたら、巻末の連絡先までお寄せください。次号の紙面づくりに活かします。</text:p>
          </draw:text-box>
        </draw:frame>
        <draw:frame draw:style-name="Frame" draw:name="cover-credit" svg:x="0.7000in" svg:y="10.6800in" svg:width="3.6000in" svg:height="0.1800in">
          <draw:text-box>
            <text:p text:style-name="Small">表紙画像：Wikimedia Commons / CC BY-SA 4.0</text:p>
          </draw:text-box>
        </draw:frame>
      </draw:page>
      <draw:page draw:name="02-feature" draw:master-page-name="NewsletterMaster" draw:style-name="PageWhite">
        <draw:frame draw:style-name="Frame" draw:name="header-2" svg:x="0.5500in" svg:y="0.2800in" svg:width="2.5000in" svg:height="0.2200in">
          <draw:text-box>
            <text:p text:style-name="Small">特集</text:p>
          </draw:text-box>
        </draw:frame>
        <draw:frame draw:style-name="Frame" draw:name="page-2" svg:x="7.2000in" svg:y="0.2700in" svg:width="0.5200in" svg:height="0.2200in">
          <draw:text-box>
            <text:p text:style-name="Small">02</text:p>
          </draw:text-box>
        </draw:frame>
        <draw:line draw:style-name="Hairline" draw:name="header-rule-2" svg:x1="0.5500in" svg:y1="0.5700in" svg:x2="7.7200in" svg:y2="0.5700in"/>
        <draw:frame draw:style-name="Frame" draw:name="feature-kicker" svg:x="0.6000in" svg:y="0.9200in" svg:width="2.0000in" svg:height="0.2500in">
          <draw:text-box>
            <text:p text:style-name="Kicker">今号の特集</text:p>
          </draw:text-box>
        </draw:frame>
        <draw:frame draw:style-name="Frame" draw:name="feature-title" svg:x="0.6000in" svg:y="1.2500in" svg:width="6.8000in" svg:height="1.0500in">
          <draw:text-box>
            <text:p text:style-name="PageTitle">顔を合わせるところから、</text:p>
            <text:p text:style-name="PageTitle">地域の次の一年が始まる。</text:p>
          </draw:text-box>
        </draw:frame>
        <draw:frame draw:style-name="Frame" draw:name="feature-photo" svg:x="0.6000in" svg:y="2.5500in" svg:width="7.0700in" svg:height="3.2800in">
          <draw:image xlink:href="Pictures/08A077814E534C8CBAF012C3B9E91047.jpg" xlink:type="simple" xlink:show="embed" xlink:actuate="onLoad"/>
        </draw:frame>
        <draw:frame draw:style-name="Frame" draw:name="feature-caption" svg:x="0.6000in" svg:y="5.9500in" svg:width="5.9000in" svg:height="0.2400in">
          <draw:text-box>
            <text:p text:style-name="Caption">初夏の交流会。年齢や所属を越えて、自然な会話が生まれました。</text:p>
          </draw:text-box>
        </draw:frame>
        <draw:frame draw:style-name="Frame" draw:name="feature-lead" svg:x="0.6000in" svg:y="6.4800in" svg:width="6.9500in" svg:height="0.7200in">
          <draw:text-box>
            <text:p text:style-name="Head">一度の行事を成功させることより、次に声を掛け合える関係を残すこと。</text:p>
          </draw:text-box>
        </draw:frame>
        <draw:frame draw:style-name="Frame" draw:name="feature-body-left" svg:x="0.6000in" svg:y="7.3500in" svg:width="3.3500in" svg:height="3.1500in">
          <draw:text-box>
            <text:p text:style-name="BodyDense">6月15日、地域交流会を開催しました。企画の中心に置いたのは、参加者が無理なく話し始められることです。受付で案内カードを渡し、会場には椅子を詰め込みすぎず、立ち話のできる余白を残しました。</text:p>
            <text:p text:style-name="BodyDense"/>
            <text:p text:style-name="BodyDense">当日は86名が参加し、7つの地域団体から協力をいただきました。開始直後は知り合い同士で集まる姿が多く見られましたが、紹介役のスタッフが間に入ることで、少しずつ会話の輪が広がりました。</text:p>
            <text:p text:style-name="BodyDense"/>
            <text:p text:style-name="BodyDense">終了後のアンケートでは、『話しかけてもらえて安心した』『地域で活動する人を知ることができた』という声が寄せられました。一方で、受付周辺が混み合ったことや、初参加者向けの表示が不足していたことは次回の課題です。</text:p>
          </draw:text-box>
        </draw:frame>
        <draw:rect draw:style-name="PaleFill" draw:name="feature-side" svg:x="4.3000in" svg:y="7.3500in" svg:width="3.3700in" svg:height="3.5500in"/>
        <draw:frame draw:style-name="Frame" draw:name="feature-side-number" svg:x="4.6500in" svg:y="7.7200in" svg:width="1.2500in" svg:height="0.5500in">
          <draw:text-box>
            <text:p text:style-name="Number">86</text:p>
          </draw:text-box>
        </draw:frame>
        <draw:frame draw:style-name="Frame" draw:name="feature-side-label" svg:x="5.9500in" svg:y="7.8800in" svg:width="1.0500in" svg:height="0.2200in">
          <draw:text-box>
            <text:p text:style-name="Small">参加者</text:p>
          </draw:text-box>
        </draw:frame>
        <draw:line draw:style-name="Hairline" draw:name="feature-side-rule-1" svg:x1="4.6400in" svg:y1="8.4700in" svg:x2="7.3000in" svg:y2="8.4700in"/>
        <draw:frame draw:style-name="Frame" draw:name="feature-side-number-2" svg:x="4.6500in" svg:y="8.6800in" svg:width="1.2500in" svg:height="0.5500in">
          <draw:text-box>
            <text:p text:style-name="Number">7</text:p>
          </draw:text-box>
        </draw:frame>
        <draw:frame draw:style-name="Frame" draw:name="feature-side-label-2" svg:x="5.9500in" svg:y="8.8400in" svg:width="1.0500in" svg:height="0.2200in">
          <draw:text-box>
            <text:p text:style-name="Small">協力団体</text:p>
          </draw:text-box>
        </draw:frame>
        <draw:frame draw:style-name="Frame" draw:name="feature-side-note" svg:x="4.6500in" svg:y="9.4000in" svg:width="2.5500in" svg:height="0.8800in">
          <draw:text-box>
            <text:p text:style-name="BodyTiny">実施後の声</text:p>
            <text:p text:style-name="BodyTiny">『次に会ったとき、挨拶できる人が増えました』</text:p>
            <text:p text:style-name="BodyTiny"/>
            <text:p text:style-name="BodyTiny">次回は受付案内と初参加者向けの表示を改善します。</text:p>
          </draw:text-box>
        </draw:frame>
        <draw:line draw:style-name="Hairline" draw:name="footer-rule-2" svg:x1="0.5500in" svg:y1="11.0500in" svg:x2="7.7200in" svg:y2="11.0500in"/>
        <draw:frame draw:style-name="Frame" draw:name="footer-left-2" svg:x="0.5500in" svg:y="11.1600in" svg:width="2.8000in" svg:height="0.1800in">
          <draw:text-box>
            <text:p text:style-name="Small">みどりの輪だより　第12号</text:p>
          </draw:text-box>
        </draw:frame>
        <draw:frame draw:style-name="Frame" draw:name="footer-right-2" svg:x="6.4200in" svg:y="11.1600in" svg:width="1.3000in" svg:height="0.1800in">
          <draw:text-box>
            <text:p text:style-name="Small">2026年7月発行</text:p>
          </draw:text-box>
        </draw:frame>
      </draw:page>
      <draw:page draw:name="03-activities" draw:master-page-name="NewsletterMaster" draw:style-name="PageWhite">
        <draw:frame draw:style-name="Frame" draw:name="header-3" svg:x="0.5500in" svg:y="0.2800in" svg:width="2.5000in" svg:height="0.2200in">
          <draw:text-box>
            <text:p text:style-name="Small">活動の記録</text:p>
          </draw:text-box>
        </draw:frame>
        <draw:frame draw:style-name="Frame" draw:name="page-3" svg:x="7.2000in" svg:y="0.2700in" svg:width="0.5200in" svg:height="0.2200in">
          <draw:text-box>
            <text:p text:style-name="Small">03</text:p>
          </draw:text-box>
        </draw:frame>
        <draw:line draw:style-name="Hairline" draw:name="header-rule-3" svg:x1="0.5500in" svg:y1="0.5700in" svg:x2="7.7200in" svg:y2="0.5700in"/>
        <draw:frame draw:style-name="Frame" draw:name="activities-title" svg:x="0.6000in" svg:y="0.9200in" svg:width="4.5000in" svg:height="0.5000in">
          <draw:text-box>
            <text:p text:style-name="PageTitle">この季節の活動</text:p>
          </draw:text-box>
        </draw:frame>
        <draw:frame draw:style-name="Frame" draw:name="activities-intro" svg:x="0.6000in" svg:y="1.5200in" svg:width="6.9000in" svg:height="0.3000in">
          <draw:text-box>
            <text:p text:style-name="BodySmall">写真と短い文章を組み合わせ、複数の活動を一ページで紹介する型です。</text:p>
          </draw:text-box>
        </draw:frame>
        <draw:frame draw:style-name="Frame" draw:name="activity-photo-1" svg:x="0.6000in" svg:y="2.0500in" svg:width="3.4000in" svg:height="2.3500in">
          <draw:image xlink:href="Pictures/243AA51655F54963950322757F884811.jpg" xlink:type="simple" xlink:show="embed" xlink:actuate="onLoad"/>
        </draw:frame>
        <draw:frame draw:style-name="Frame" draw:name="activity-date-1" svg:x="0.6000in" svg:y="4.5700in" svg:width="0.7500in" svg:height="0.2200in">
          <draw:text-box>
            <text:p text:style-name="Kicker">5月18日</text:p>
          </draw:text-box>
        </draw:frame>
        <draw:frame draw:style-name="Frame" draw:name="activity-head-1" svg:x="1.4300in" svg:y="4.5300in" svg:width="2.5000in" svg:height="0.3000in">
          <draw:text-box>
            <text:p text:style-name="Subhead">みんなで庭づくり</text:p>
          </draw:text-box>
        </draw:frame>
        <draw:frame draw:style-name="Frame" draw:name="activity-body-1" svg:x="0.6000in" svg:y="4.9500in" svg:width="3.4000in" svg:height="0.9800in">
          <draw:text-box>
            <text:p text:style-name="BodyTiny">花壇の植え替えと通路の手入れを行いました。多年草を中心に選び、手入れの回数を増やしすぎない計画にしています。作業後は、秋に植えたい植物について意見を交わしました。</text:p>
          </draw:text-box>
        </draw:frame>
        <draw:frame draw:style-name="Frame" draw:name="activity-photo-2" svg:x="4.2700in" svg:y="2.0500in" svg:width="3.4000in" svg:height="2.3500in">
          <draw:image xlink:href="Pictures/E842CFD2E90D4135BC5280232A9BDEA8.jpg" xlink:type="simple" xlink:show="embed" xlink:actuate="onLoad"/>
        </draw:frame>
        <draw:frame draw:style-name="Frame" draw:name="activity-date-2" svg:x="4.2700in" svg:y="4.5700in" svg:width="0.6800in" svg:height="0.2200in">
          <draw:text-box>
            <text:p text:style-name="Kicker">6月2日</text:p>
          </draw:text-box>
        </draw:frame>
        <draw:frame draw:style-name="Frame" draw:name="activity-head-2" svg:x="5.0500in" svg:y="4.5300in" svg:width="2.5000in" svg:height="0.3000in">
          <draw:text-box>
            <text:p text:style-name="Subhead">交流ミニ講座</text:p>
          </draw:text-box>
        </draw:frame>
        <draw:frame draw:style-name="Frame" draw:name="activity-body-2" svg:x="4.2700in" svg:y="4.9500in" svg:width="3.4000in" svg:height="0.9800in">
          <draw:text-box>
            <text:p text:style-name="BodyTiny">暮らしの中で役立つ小さな工夫を学びました。講師の説明だけで終わらせず、質問の時間を長めに確保。参加者からも経験談が紹介され、身近な知恵を共有する時間になりました。</text:p>
          </draw:text-box>
        </draw:frame>
        <draw:line draw:style-name="Hairline" draw:name="activities-mid-rule" svg:x1="0.6000in" svg:y1="6.1500in" svg:x2="7.6700in" svg:y2="6.1500in"/>
        <draw:frame draw:style-name="Frame" draw:name="activity-photo-3" svg:x="0.6000in" svg:y="7.2000in" svg:width="2.5500in" svg:height="2.3500in">
          <draw:image xlink:href="Pictures/384F553BC334485BA9EC81565C7A8420.jpg" xlink:type="simple" xlink:show="embed" xlink:actuate="onLoad"/>
        </draw:frame>
        <draw:frame draw:style-name="Frame" draw:name="activity-date-3" svg:x="3.4500in" svg:y="6.5200in" svg:width="0.7500in" svg:height="0.2200in">
          <draw:text-box>
            <text:p text:style-name="Kicker">6月15日</text:p>
          </draw:text-box>
        </draw:frame>
        <draw:frame draw:style-name="Frame" draw:name="activity-head-3" svg:x="3.4500in" svg:y="6.9000in" svg:width="2.9000in" svg:height="0.3400in">
          <draw:text-box>
            <text:p text:style-name="Head">初夏の交流会</text:p>
          </draw:text-box>
        </draw:frame>
        <draw:frame draw:style-name="Frame" draw:name="activity-body-3" svg:x="3.4500in" svg:y="7.4400in" svg:width="4.0500in" svg:height="2.5500in">
          <draw:text-box>
            <text:p text:style-name="BodyDense">会場を歩きながら話せる時間を設け、普段は接点の少ない人同士が顔を合わせました。運営には学生と地域団体の皆さんが参加し、受付、案内、写真記録を分担しました。</text:p>
            <text:p text:style-name="BodyDense"/>
            <text:p text:style-name="BodyDense">今回は、事前申込みをしていない方も立ち寄れる時間を設けました。散歩の途中で参加した方や、掲示板を見て来場した方もあり、今後の案内方法を考える手がかりになりました。</text:p>
            <text:p text:style-name="BodyDense"/>
            <text:p text:style-name="BodyDense">参加者の声</text:p>
            <text:p text:style-name="BodyDense">『知っている顔が増えて、次の行事にも参加しやすくなりました。』</text:p>
          </draw:text-box>
        </draw:frame>
        <draw:frame draw:style-name="Frame" draw:name="activities-credit" svg:x="0.6000in" svg:y="10.4800in" svg:width="3.5000in" svg:height="0.1800in">
          <draw:text-box>
            <text:p text:style-name="Small">写真：Wikimedia Commons / Public Domain</text:p>
          </draw:text-box>
        </draw:frame>
        <draw:line draw:style-name="Hairline" draw:name="footer-rule-3" svg:x1="0.5500in" svg:y1="11.0500in" svg:x2="7.7200in" svg:y2="11.0500in"/>
        <draw:frame draw:style-name="Frame" draw:name="footer-left-3" svg:x="0.5500in" svg:y="11.1600in" svg:width="2.8000in" svg:height="0.1800in">
          <draw:text-box>
            <text:p text:style-name="Small">みどりの輪だより　第12号</text:p>
          </draw:text-box>
        </draw:frame>
        <draw:frame draw:style-name="Frame" draw:name="footer-right-3" svg:x="6.4200in" svg:y="11.1600in" svg:width="1.3000in" svg:height="0.1800in">
          <draw:text-box>
            <text:p text:style-name="Small">2026年7月発行</text:p>
          </draw:text-box>
        </draw:frame>
      </draw:page>
      <draw:page draw:name="04-album" draw:master-page-name="NewsletterMaster" draw:style-name="PageWarm">
        <draw:frame draw:style-name="Frame" draw:name="header-4" svg:x="0.5500in" svg:y="0.2800in" svg:width="2.5000in" svg:height="0.2200in">
          <draw:text-box>
            <text:p text:style-name="Small">写真アルバム</text:p>
          </draw:text-box>
        </draw:frame>
        <draw:frame draw:style-name="Frame" draw:name="page-4" svg:x="7.2000in" svg:y="0.2700in" svg:width="0.5200in" svg:height="0.2200in">
          <draw:text-box>
            <text:p text:style-name="Small">04</text:p>
          </draw:text-box>
        </draw:frame>
        <draw:line draw:style-name="Hairline" draw:name="header-rule-4" svg:x1="0.5500in" svg:y1="0.5700in" svg:x2="7.7200in" svg:y2="0.5700in"/>
        <draw:frame draw:style-name="Frame" draw:name="album-title" svg:x="0.6000in" svg:y="0.9200in" svg:width="5.0000in" svg:height="0.5000in">
          <draw:text-box>
            <text:p text:style-name="PageTitle">写真で振り返る一日</text:p>
          </draw:text-box>
        </draw:frame>
        <draw:frame draw:style-name="Frame" draw:name="album-copy" svg:x="0.6000in" svg:y="1.5000in" svg:width="5.0000in" svg:height="0.2500in">
          <draw:text-box>
            <text:p text:style-name="BodySmall">写真を主役にし、説明は一行に抑えるページ型です。</text:p>
          </draw:text-box>
        </draw:frame>
        <draw:frame draw:style-name="ImageFrame" draw:name="album-1" svg:x="0.6000in" svg:y="2.0200in" svg:width="4.4400in" svg:height="2.7200in">
          <draw:image xlink:href="Pictures/7C4FAE22A0E44E8E94A1E9A11A177782.jpg" xlink:type="simple" xlink:show="embed" xlink:actuate="onLoad"/>
        </draw:frame>
        <draw:frame draw:style-name="Frame" draw:name="album-cap-1" svg:x="0.6000in" svg:y="4.8400in" svg:width="4.4500in" svg:height="0.2400in">
          <draw:text-box>
            <text:p text:style-name="Caption">会場のステージ。世代を越えた発表が続きました。</text:p>
          </draw:text-box>
        </draw:frame>
        <draw:frame draw:style-name="ImageFrame" draw:name="album-2" svg:x="5.2200in" svg:y="2.0200in" svg:width="2.4500in" svg:height="2.7200in">
          <draw:image xlink:href="Pictures/B8633F60F6554807B7AA0BB78B80C595.jpg" xlink:type="simple" xlink:show="embed" xlink:actuate="onLoad"/>
        </draw:frame>
        <draw:frame draw:style-name="Frame" draw:name="album-cap-2" svg:x="5.2200in" svg:y="4.8400in" svg:width="2.4500in" svg:height="0.2400in">
          <draw:text-box>
            <text:p text:style-name="Caption">笑顔が集まる休憩時間。</text:p>
          </draw:text-box>
        </draw:frame>
        <draw:frame draw:style-name="ImageFrame" draw:name="album-3" svg:x="0.6000in" svg:y="5.4200in" svg:width="2.5500in" svg:height="2.4200in">
          <draw:image xlink:href="Pictures/A2212F7C641B499CBACAD94A84A73F88.jpg" xlink:type="simple" xlink:show="embed" xlink:actuate="onLoad"/>
        </draw:frame>
        <draw:frame draw:style-name="Frame" draw:name="album-cap-3" svg:x="0.6000in" svg:y="7.9400in" svg:width="2.5500in" svg:height="0.2400in">
          <draw:text-box>
            <text:p text:style-name="Caption">花壇づくりも少しずつ進みました。</text:p>
          </draw:text-box>
        </draw:frame>
        <draw:frame draw:style-name="ImageFrame" draw:name="album-4" svg:x="3.3400in" svg:y="5.4200in" svg:width="4.3300in" svg:height="2.4200in">
          <draw:image xlink:href="Pictures/2CFCDF9F39D449CA85EEBB44A7974563.jpg" xlink:type="simple" xlink:show="embed" xlink:actuate="onLoad"/>
        </draw:frame>
        <draw:frame draw:style-name="Frame" draw:name="album-cap-4" svg:x="3.3400in" svg:y="7.9400in" svg:width="4.3300in" svg:height="0.2400in">
          <draw:text-box>
            <text:p text:style-name="Caption">学びの時間。質問から新しい話題が生まれます。</text:p>
          </draw:text-box>
        </draw:frame>
        <draw:rect draw:style-name="WhiteFill" draw:name="album-note" svg:x="0.6000in" svg:y="8.6000in" svg:width="7.0700in" svg:height="1.5200in"/>
        <draw:frame draw:style-name="Frame" draw:name="album-note-head" svg:x="0.9000in" svg:y="8.9000in" svg:width="2.6000in" svg:height="0.3000in">
          <draw:text-box>
            <text:p text:style-name="Head">写真を選ぶときの目安</text:p>
          </draw:text-box>
        </draw:frame>
        <draw:frame draw:style-name="Frame" draw:name="album-note-body" svg:x="0.9000in" svg:y="9.3500in" svg:width="6.3500in" svg:height="0.5500in">
          <draw:text-box>
            <text:p text:style-name="BodySmall">集合写真だけでなく、手元、会話、準備中の様子を混ぜると、活動の空気が伝わります。キャプションには『いつ・何をしているか』を短く添えます。</text:p>
          </draw:text-box>
        </draw:frame>
        <draw:frame draw:style-name="Frame" draw:name="album-credit" svg:x="0.6000in" svg:y="10.4800in" svg:width="3.5000in" svg:height="0.1800in">
          <draw:text-box>
            <text:p text:style-name="Small">写真：Wikimedia Commons / Public Domain</text:p>
          </draw:text-box>
        </draw:frame>
        <draw:line draw:style-name="Hairline" draw:name="footer-rule-4" svg:x1="0.5500in" svg:y1="11.0500in" svg:x2="7.7200in" svg:y2="11.0500in"/>
        <draw:frame draw:style-name="Frame" draw:name="footer-left-4" svg:x="0.5500in" svg:y="11.1600in" svg:width="2.8000in" svg:height="0.1800in">
          <draw:text-box>
            <text:p text:style-name="Small">みどりの輪だより　第12号</text:p>
          </draw:text-box>
        </draw:frame>
        <draw:frame draw:style-name="Frame" draw:name="footer-right-4" svg:x="6.4200in" svg:y="11.1600in" svg:width="1.3000in" svg:height="0.1800in">
          <draw:text-box>
            <text:p text:style-name="Small">2026年7月発行</text:p>
          </draw:text-box>
        </draw:frame>
      </draw:page>
      <draw:page draw:name="05-essay" draw:master-page-name="NewsletterMaster" draw:style-name="PageWhite">
        <draw:frame draw:style-name="Frame" draw:name="header-5" svg:x="0.5500in" svg:y="0.2800in" svg:width="2.5000in" svg:height="0.2200in">
          <draw:text-box>
            <text:p text:style-name="Small">寄稿・読み物</text:p>
          </draw:text-box>
        </draw:frame>
        <draw:frame draw:style-name="Frame" draw:name="page-5" svg:x="7.2000in" svg:y="0.2700in" svg:width="0.5200in" svg:height="0.2200in">
          <draw:text-box>
            <text:p text:style-name="Small">05</text:p>
          </draw:text-box>
        </draw:frame>
        <draw:line draw:style-name="Hairline" draw:name="header-rule-5" svg:x1="0.5500in" svg:y1="0.5700in" svg:x2="7.7200in" svg:y2="0.5700in"/>
        <draw:frame draw:style-name="Frame" draw:name="essay-kicker" svg:x="0.6000in" svg:y="0.9200in" svg:width="2.5000in" svg:height="0.2500in">
          <draw:text-box>
            <text:p text:style-name="Kicker">地域からの寄稿</text:p>
          </draw:text-box>
        </draw:frame>
        <draw:frame draw:style-name="Frame" draw:name="essay-title" svg:x="0.6000in" svg:y="1.2800in" svg:width="6.7000in" svg:height="0.9000in">
          <draw:text-box>
            <text:p text:style-name="PageTitle">『ただいま』と言える場所を、</text:p>
            <text:p text:style-name="PageTitle">これからも残していく。</text:p>
          </draw:text-box>
        </draw:frame>
        <draw:frame draw:style-name="Frame" draw:name="essay-author" svg:x="0.6000in" svg:y="2.3600in" svg:width="3.4000in" svg:height="0.2400in">
          <draw:text-box>
            <text:p text:style-name="Small">寄稿　地域文庫スタッフ　高橋 美咲</text:p>
          </draw:text-box>
        </draw:frame>
        <draw:rect draw:style-name="PaleFill" draw:name="essay-quote-bg" svg:x="0.6000in" svg:y="2.9200in" svg:width="2.5500in" svg:height="4.2800in"/>
        <draw:frame draw:style-name="Frame" draw:name="essay-quote" svg:x="0.9200in" svg:y="3.3500in" svg:width="1.9400in" svg:height="2.9500in">
          <draw:text-box>
            <text:p text:style-name="Quote">本を借りなくても、</text:p>
            <text:p text:style-name="Quote">顔を見せに来られる。</text:p>
            <text:p text:style-name="Quote"/>
            <text:p text:style-name="Quote">そんな場所で</text:p>
            <text:p text:style-name="Quote">ありたい。</text:p>
          </draw:text-box>
        </draw:frame>
        <draw:frame draw:style-name="Frame" draw:name="essay-body-1" svg:x="3.5200in" svg:y="2.9200in" svg:width="3.7200in" svg:height="4.2800in">
          <draw:text-box>
            <text:p text:style-name="BodyDense">地域文庫を始めてから、十年が経ちました。最初は本棚が二つと、小さな机が一つだけ。利用者が来ない日もあり、この場所が本当に必要なのか迷ったこともあります。</text:p>
            <text:p text:style-name="BodyDense"/>
            <text:p text:style-name="BodyDense">それでも毎週扉を開けていると、学校帰りの子どもが宿題をしたり、散歩の途中に立ち寄る方が増えたりしました。いつしか、本を借りなくても『ちょっと顔を見に来た』と言ってもらえるようになりました。</text:p>
            <text:p text:style-name="BodyDense"/>
            <text:p text:style-name="BodyDense">転機になったのは、地域の方から昔の写真を寄贈していただいたことです。写真を囲んで話を聞く会を開くと、世代の違う人たちが同じ風景について語り始めました。本棚だけだった場所が、記憶を受け渡す場所にもなりました。</text:p>
          </draw:text-box>
        </draw:frame>
        <draw:frame draw:style-name="Frame" draw:name="essay-body-2" svg:x="0.6000in" svg:y="7.6200in" svg:width="6.6400in" svg:height="2.4200in">
          <draw:text-box>
            <text:p text:style-name="BodyDense">場所を続けることは、特別な催しを増やすことだけではありません。同じ曜日、同じ時間に、誰かがいること。その積み重ねが安心につながるのだと思います。</text:p>
            <text:p text:style-name="BodyDense"/>
            <text:p text:style-name="BodyDense">運営する側も、すべてを完璧に準備できるわけではありません。できる人が、できる日に、できることを持ち寄る。その柔らかさがあったからこそ、十年間続けることができました。</text:p>
            <text:p text:style-name="BodyDense"/>
            <text:p text:style-name="BodyDense">これからは蔵書の整理と、古くなった机の入れ替えを予定しています。変えるところと残すところを、利用する皆さんと相談しながら決めていきます。</text:p>
            <text:p text:style-name="BodyDense"/>
            <text:p text:style-name="BodyDense">初めての方も、久しぶりの方も、どうぞ気軽に扉を開けてください。『ただいま』と言える場所であり続けたいと思います。</text:p>
          </draw:text-box>
        </draw:frame>
        <draw:frame draw:style-name="Frame" draw:name="essay-sign" svg:x="5.2800in" svg:y="10.4300in" svg:width="1.9600in" svg:height="0.2300in">
          <draw:text-box>
            <text:p text:style-name="Small">地域文庫スタッフ一同</text:p>
          </draw:text-box>
        </draw:frame>
        <draw:line draw:style-name="Hairline" draw:name="footer-rule-5" svg:x1="0.5500in" svg:y1="11.0500in" svg:x2="7.7200in" svg:y2="11.0500in"/>
        <draw:frame draw:style-name="Frame" draw:name="footer-left-5" svg:x="0.5500in" svg:y="11.1600in" svg:width="2.8000in" svg:height="0.1800in">
          <draw:text-box>
            <text:p text:style-name="Small">みどりの輪だより　第12号</text:p>
          </draw:text-box>
        </draw:frame>
        <draw:frame draw:style-name="Frame" draw:name="footer-right-5" svg:x="6.4200in" svg:y="11.1600in" svg:width="1.3000in" svg:height="0.1800in">
          <draw:text-box>
            <text:p text:style-name="Small">2026年7月発行</text:p>
          </draw:text-box>
        </draw:frame>
      </draw:page>
      <draw:page draw:name="06-timeline" draw:master-page-name="NewsletterMaster" draw:style-name="PageWhite">
        <draw:frame draw:style-name="Frame" draw:name="header-6" svg:x="0.5500in" svg:y="0.2800in" svg:width="2.5000in" svg:height="0.2200in">
          <draw:text-box>
            <text:p text:style-name="Small">事業・活動報告</text:p>
          </draw:text-box>
        </draw:frame>
        <draw:frame draw:style-name="Frame" draw:name="page-6" svg:x="7.2000in" svg:y="0.2700in" svg:width="0.5200in" svg:height="0.2200in">
          <draw:text-box>
            <text:p text:style-name="Small">06</text:p>
          </draw:text-box>
        </draw:frame>
        <draw:line draw:style-name="Hairline" draw:name="header-rule-6" svg:x1="0.5500in" svg:y1="0.5700in" svg:x2="7.7200in" svg:y2="0.5700in"/>
        <draw:frame draw:style-name="Frame" draw:name="timeline-title" svg:x="0.6000in" svg:y="0.9200in" svg:width="6.5000in" svg:height="0.5000in">
          <draw:text-box>
            <text:p text:style-name="PageTitle">庭づくり計画　これまでとこれから</text:p>
          </draw:text-box>
        </draw:frame>
        <draw:frame draw:style-name="Frame" draw:name="timeline-photo" svg:x="0.6000in" svg:y="1.6600in" svg:width="7.0700in" svg:height="2.4200in">
          <draw:image xlink:href="Pictures/780BA540781446A3B6E1E793F3C268F2.jpg" xlink:type="simple" xlink:show="embed" xlink:actuate="onLoad"/>
        </draw:frame>
        <draw:frame draw:style-name="Frame" draw:name="timeline-caption" svg:x="0.6000in" svg:y="4.2000in" svg:width="4.6000in" svg:height="0.2200in">
          <draw:text-box>
            <text:p text:style-name="Caption">季節の変化を楽しめる、小さな庭を目指しています。</text:p>
          </draw:text-box>
        </draw:frame>
        <draw:line draw:style-name="Rule" draw:name="timeline-axis" svg:x1="1.1800in" svg:y1="5.1200in" svg:x2="1.1800in" svg:y2="9.8500in"/>
        <draw:rect draw:style-name="GoldFill" draw:name="timeline-dot-0" svg:x="1.0700in" svg:y="4.9800in" svg:width="0.2200in" svg:height="0.2200in"/>
        <draw:frame draw:style-name="Frame" draw:name="timeline-month-0" svg:x="0.6000in" svg:y="4.9000in" svg:width="0.3800in" svg:height="0.2400in">
          <draw:text-box>
            <text:p text:style-name="Kicker">4月</text:p>
          </draw:text-box>
        </draw:frame>
        <draw:frame draw:style-name="Frame" draw:name="timeline-head-0" svg:x="1.5800in" svg:y="4.8200in" svg:width="2.6500in" svg:height="0.3000in">
          <draw:text-box>
            <text:p text:style-name="Subhead">計画づくり</text:p>
          </draw:text-box>
        </draw:frame>
        <draw:frame draw:style-name="Frame" draw:name="timeline-body-0" svg:x="4.0800in" svg:y="4.8200in" svg:width="3.2500in" svg:height="0.7200in">
          <draw:text-box>
            <text:p text:style-name="BodyTiny">利用者の声を集め、植える場所と作業日を決めました。通路幅と日当たりも現地で確認しました。</text:p>
          </draw:text-box>
        </draw:frame>
        <draw:rect draw:style-name="GoldFill" draw:name="timeline-dot-1" svg:x="1.0700in" svg:y="6.2800in" svg:width="0.2200in" svg:height="0.2200in"/>
        <draw:frame draw:style-name="Frame" draw:name="timeline-month-1" svg:x="0.6000in" svg:y="6.2000in" svg:width="0.3800in" svg:height="0.2400in">
          <draw:text-box>
            <text:p text:style-name="Kicker">5月</text:p>
          </draw:text-box>
        </draw:frame>
        <draw:frame draw:style-name="Frame" draw:name="timeline-head-1" svg:x="1.5800in" svg:y="6.1200in" svg:width="2.6500in" svg:height="0.3000in">
          <draw:text-box>
            <text:p text:style-name="Subhead">土づくり・植え替え</text:p>
          </draw:text-box>
        </draw:frame>
        <draw:frame draw:style-name="Frame" draw:name="timeline-body-1" svg:x="4.0800in" svg:y="6.1200in" svg:width="3.2500in" svg:height="0.7200in">
          <draw:text-box>
            <text:p text:style-name="BodyTiny">多年草を中心に選び、初めての方も参加できる作業にしました。道具は団体側で準備しました。</text:p>
          </draw:text-box>
        </draw:frame>
        <draw:rect draw:style-name="GoldFill" draw:name="timeline-dot-2" svg:x="1.0700in" svg:y="7.5800in" svg:width="0.2200in" svg:height="0.2200in"/>
        <draw:frame draw:style-name="Frame" draw:name="timeline-month-2" svg:x="0.6000in" svg:y="7.5000in" svg:width="0.3800in" svg:height="0.2400in">
          <draw:text-box>
            <text:p text:style-name="Kicker">6月</text:p>
          </draw:text-box>
        </draw:frame>
        <draw:frame draw:style-name="Frame" draw:name="timeline-head-2" svg:x="1.5800in" svg:y="7.4200in" svg:width="2.6500in" svg:height="0.3000in">
          <draw:text-box>
            <text:p text:style-name="Subhead">通路と案内表示</text:p>
          </draw:text-box>
        </draw:frame>
        <draw:frame draw:style-name="Frame" draw:name="timeline-body-2" svg:x="4.0800in" svg:y="7.4200in" svg:width="3.2500in" svg:height="0.7200in">
          <draw:text-box>
            <text:p text:style-name="BodyTiny">歩きやすさを確認し、植物の名前を紹介する小さな札を設置しました。雨天時の水たまりも点検しました。</text:p>
          </draw:text-box>
        </draw:frame>
        <draw:rect draw:style-name="GoldFill" draw:name="timeline-dot-3" svg:x="1.0700in" svg:y="8.8800in" svg:width="0.2200in" svg:height="0.2200in"/>
        <draw:frame draw:style-name="Frame" draw:name="timeline-month-3" svg:x="0.6000in" svg:y="8.8000in" svg:width="0.3800in" svg:height="0.2400in">
          <draw:text-box>
            <text:p text:style-name="Kicker">秋</text:p>
          </draw:text-box>
        </draw:frame>
        <draw:frame draw:style-name="Frame" draw:name="timeline-head-3" svg:x="1.5800in" svg:y="8.7200in" svg:width="2.6500in" svg:height="0.3000in">
          <draw:text-box>
            <text:p text:style-name="Subhead">振り返りと次年度計画</text:p>
          </draw:text-box>
        </draw:frame>
        <draw:frame draw:style-name="Frame" draw:name="timeline-body-3" svg:x="4.0800in" svg:y="8.7200in" svg:width="3.2500in" svg:height="0.7200in">
          <draw:text-box>
            <text:p text:style-name="BodyTiny">育ち方を確認し、手入れの負担が大きい部分を見直します。参加者の意見も次年度計画へ反映します。</text:p>
          </draw:text-box>
        </draw:frame>
        <draw:frame draw:style-name="Frame" draw:name="timeline-note" svg:x="0.6000in" svg:y="10.1000in" svg:width="6.8000in" svg:height="0.6200in">
          <draw:text-box>
            <text:p text:style-name="BodyTiny">事業費や担当者、判断した理由など、説明が必要な情報は各工程の横へ追加できます。完成結果だけでなく、途中経過と次の予定を同じページで示すことで、継続的な事業も理解されやすくなります。</text:p>
          </draw:text-box>
        </draw:frame>
        <draw:line draw:style-name="Hairline" draw:name="footer-rule-6" svg:x1="0.5500in" svg:y1="11.0500in" svg:x2="7.7200in" svg:y2="11.0500in"/>
        <draw:frame draw:style-name="Frame" draw:name="footer-left-6" svg:x="0.5500in" svg:y="11.1600in" svg:width="2.8000in" svg:height="0.1800in">
          <draw:text-box>
            <text:p text:style-name="Small">みどりの輪だより　第12号</text:p>
          </draw:text-box>
        </draw:frame>
        <draw:frame draw:style-name="Frame" draw:name="footer-right-6" svg:x="6.4200in" svg:y="11.1600in" svg:width="1.3000in" svg:height="0.1800in">
          <draw:text-box>
            <text:p text:style-name="Small">2026年7月発行</text:p>
          </draw:text-box>
        </draw:frame>
      </draw:page>
      <draw:page draw:name="07-qa" draw:master-page-name="NewsletterMaster" draw:style-name="PageWarm">
        <draw:frame draw:style-name="Frame" draw:name="header-7" svg:x="0.5500in" svg:y="0.2800in" svg:width="2.5000in" svg:height="0.2200in">
          <draw:text-box>
            <text:p text:style-name="Small">Q&amp;A・お知らせ</text:p>
          </draw:text-box>
        </draw:frame>
        <draw:frame draw:style-name="Frame" draw:name="page-7" svg:x="7.2000in" svg:y="0.2700in" svg:width="0.5200in" svg:height="0.2200in">
          <draw:text-box>
            <text:p text:style-name="Small">07</text:p>
          </draw:text-box>
        </draw:frame>
        <draw:line draw:style-name="Hairline" draw:name="header-rule-7" svg:x1="0.5500in" svg:y1="0.5700in" svg:x2="7.7200in" svg:y2="0.5700in"/>
        <draw:frame draw:style-name="Frame" draw:name="qa-title" svg:x="0.6000in" svg:y="0.9200in" svg:width="6.7000in" svg:height="0.5000in">
          <draw:text-box>
            <text:p text:style-name="PageTitle">よくある質問と、これからの予定</text:p>
          </draw:text-box>
        </draw:frame>
        <draw:frame draw:style-name="Frame" draw:name="qa-q1" svg:x="0.6000in" svg:y="1.7200in" svg:width="3.4500in" svg:height="0.3800in">
          <draw:text-box>
            <text:p text:style-name="QAQuestion">Q. 初めてでも参加できますか？</text:p>
          </draw:text-box>
        </draw:frame>
        <draw:frame draw:style-name="Frame" draw:name="qa-a1" svg:x="0.6000in" svg:y="2.2000in" svg:width="3.4200in" svg:height="0.8000in">
          <draw:text-box>
            <text:p text:style-name="BodySmall">はい。事前知識や持ち物が必要な場合は、案内に明記します。見学だけの参加も歓迎しています。</text:p>
          </draw:text-box>
        </draw:frame>
        <draw:frame draw:style-name="Frame" draw:name="qa-q2" svg:x="0.6000in" svg:y="3.1800in" svg:width="3.4500in" svg:height="0.3800in">
          <draw:text-box>
            <text:p text:style-name="QAQuestion">Q. 子どもと一緒でも大丈夫ですか？</text:p>
          </draw:text-box>
        </draw:frame>
        <draw:frame draw:style-name="Frame" draw:name="qa-a2" svg:x="0.6000in" svg:y="3.6600in" svg:width="3.4200in" svg:height="0.8000in">
          <draw:text-box>
            <text:p text:style-name="BodySmall">行事ごとに対象年齢が異なります。安全上の注意がある場合は、申込み時にご案内します。</text:p>
          </draw:text-box>
        </draw:frame>
        <draw:frame draw:style-name="Frame" draw:name="qa-q3" svg:x="0.6000in" svg:y="4.6400in" svg:width="3.4500in" svg:height="0.3800in">
          <draw:text-box>
            <text:p text:style-name="QAQuestion">Q. 活動を手伝いたいときは？</text:p>
          </draw:text-box>
        </draw:frame>
        <draw:frame draw:style-name="Frame" draw:name="qa-a3" svg:x="0.6000in" svg:y="5.1200in" svg:width="3.4200in" svg:height="0.9000in">
          <draw:text-box>
            <text:p text:style-name="BodySmall">準備、受付、写真記録など、短時間でできる役割もあります。無理のない範囲でお知らせください。</text:p>
          </draw:text-box>
        </draw:frame>
        <draw:frame draw:style-name="Frame" draw:name="qa-q4" svg:x="0.6000in" svg:y="5.9200in" svg:width="3.4500in" svg:height="0.3800in">
          <draw:text-box>
            <text:p text:style-name="QAQuestion">Q. 写真の掲載を断ることはできますか？</text:p>
          </draw:text-box>
        </draw:frame>
        <draw:frame draw:style-name="Frame" draw:name="qa-a4" svg:x="0.6000in" svg:y="6.3800in" svg:width="3.4200in" svg:height="0.8800in">
          <draw:text-box>
            <text:p text:style-name="BodyTiny">はい。撮影や会報掲載を希望されない場合は、受付または撮影担当へお伝えください。掲載前にも確認できる運用を整えています。</text:p>
          </draw:text-box>
        </draw:frame>
        <draw:rect draw:style-name="PaleFill" draw:name="schedule-bg" svg:x="4.3500in" svg:y="1.7200in" svg:width="3.3200in" svg:height="4.4500in"/>
        <draw:frame draw:style-name="Frame" draw:name="schedule-head" svg:x="4.6800in" svg:y="2.0500in" svg:width="2.0000in" svg:height="0.3600in">
          <draw:text-box>
            <text:p text:style-name="Head">今後の予定</text:p>
          </draw:text-box>
        </draw:frame>
        <draw:frame draw:style-name="Frame" draw:name="schedule-date-0" svg:x="4.6800in" svg:y="2.7200in" svg:width="0.6800in" svg:height="0.2400in">
          <draw:text-box>
            <text:p text:style-name="Kicker">7/20</text:p>
          </draw:text-box>
        </draw:frame>
        <draw:frame draw:style-name="Frame" draw:name="schedule-title-0" svg:x="5.5000in" svg:y="2.7000in" svg:width="1.7500in" svg:height="0.2800in">
          <draw:text-box>
            <text:p text:style-name="Subhead">夏の交流会</text:p>
          </draw:text-box>
        </draw:frame>
        <draw:line draw:style-name="Hairline" draw:name="schedule-rule-0" svg:x1="4.6800in" svg:y1="3.1200in" svg:x2="7.3200in" svg:y2="3.1200in"/>
        <draw:frame draw:style-name="Frame" draw:name="schedule-date-1" svg:x="4.6800in" svg:y="3.4400in" svg:width="0.6800in" svg:height="0.2400in">
          <draw:text-box>
            <text:p text:style-name="Kicker">8/03</text:p>
          </draw:text-box>
        </draw:frame>
        <draw:frame draw:style-name="Frame" draw:name="schedule-title-1" svg:x="5.5000in" svg:y="3.4200in" svg:width="1.7500in" svg:height="0.2800in">
          <draw:text-box>
            <text:p text:style-name="Subhead">環境整備の日</text:p>
          </draw:text-box>
        </draw:frame>
        <draw:line draw:style-name="Hairline" draw:name="schedule-rule-1" svg:x1="4.6800in" svg:y1="3.8400in" svg:x2="7.3200in" svg:y2="3.8400in"/>
        <draw:frame draw:style-name="Frame" draw:name="schedule-date-2" svg:x="4.6800in" svg:y="4.1600in" svg:width="0.6800in" svg:height="0.2400in">
          <draw:text-box>
            <text:p text:style-name="Kicker">8/24</text:p>
          </draw:text-box>
        </draw:frame>
        <draw:frame draw:style-name="Frame" draw:name="schedule-title-2" svg:x="5.5000in" svg:y="4.1400in" svg:width="1.7500in" svg:height="0.2800in">
          <draw:text-box>
            <text:p text:style-name="Subhead">子ども工作教室</text:p>
          </draw:text-box>
        </draw:frame>
        <draw:line draw:style-name="Hairline" draw:name="schedule-rule-2" svg:x1="4.6800in" svg:y1="4.5600in" svg:x2="7.3200in" svg:y2="4.5600in"/>
        <draw:frame draw:style-name="Frame" draw:name="schedule-date-3" svg:x="4.6800in" svg:y="4.8800in" svg:width="0.6800in" svg:height="0.2400in">
          <draw:text-box>
            <text:p text:style-name="Kicker">9/14</text:p>
          </draw:text-box>
        </draw:frame>
        <draw:frame draw:style-name="Frame" draw:name="schedule-title-3" svg:x="5.5000in" svg:y="4.8600in" svg:width="1.7500in" svg:height="0.2800in">
          <draw:text-box>
            <text:p text:style-name="Subhead">防災ミニ講座</text:p>
          </draw:text-box>
        </draw:frame>
        <draw:line draw:style-name="Hairline" draw:name="schedule-rule-3" svg:x1="4.6800in" svg:y1="5.2800in" svg:x2="7.3200in" svg:y2="5.2800in"/>
        <draw:rect draw:style-name="WhiteFill" draw:name="notice-bg" svg:x="0.6000in" svg:y="7.5500in" svg:width="7.0700in" svg:height="2.5200in"/>
        <draw:frame draw:style-name="Frame" draw:name="notice-head" svg:x="0.9200in" svg:y="7.8500in" svg:width="1.5000in" svg:height="0.3400in">
          <draw:text-box>
            <text:p text:style-name="Head">お知らせ</text:p>
          </draw:text-box>
        </draw:frame>
        <draw:frame draw:style-name="Frame" draw:name="notice-1-head" svg:x="0.9200in" svg:y="8.3500in" svg:width="3.2500in" svg:height="0.2800in">
          <draw:text-box>
            <text:p text:style-name="Subhead">会報への掲載情報を募集しています</text:p>
          </draw:text-box>
        </draw:frame>
        <draw:frame draw:style-name="Frame" draw:name="notice-1-body" svg:x="0.9200in" svg:y="8.7600in" svg:width="3.1200in" svg:height="0.9000in">
          <draw:text-box>
            <text:p text:style-name="BodyTiny">活動写真、短い寄稿、地域で共有したい情報をお寄せください。原稿をそのまま掲載するのではなく、内容と表現を確認し、掲載時期や分量をご相談します。</text:p>
          </draw:text-box>
        </draw:frame>
        <draw:line draw:style-name="Hairline" draw:name="notice-divider" svg:x1="4.2700in" svg:y1="8.3300in" svg:x2="4.2700in" svg:y2="9.7200in"/>
        <draw:frame draw:style-name="Frame" draw:name="notice-2-head" svg:x="4.6000in" svg:y="8.3500in" svg:width="1.5000in" svg:height="0.2800in">
          <draw:text-box>
            <text:p text:style-name="Subhead">連絡方法</text:p>
          </draw:text-box>
        </draw:frame>
        <draw:frame draw:style-name="Frame" draw:name="notice-2-body" svg:x="4.6000in" svg:y="8.7600in" svg:width="2.5000in" svg:height="0.9000in">
          <draw:text-box>
            <text:p text:style-name="BodyTiny">電話：000-0000-0000</text:p>
            <text:p text:style-name="BodyTiny">メール：info@example.jp</text:p>
            <text:p text:style-name="BodyTiny">受付：平日 10:00〜16:00</text:p>
            <text:p text:style-name="BodyTiny">締切：次号発行日の約1か月前</text:p>
          </draw:text-box>
        </draw:frame>
        <draw:line draw:style-name="Hairline" draw:name="footer-rule-7" svg:x1="0.5500in" svg:y1="11.0500in" svg:x2="7.7200in" svg:y2="11.0500in"/>
        <draw:frame draw:style-name="Frame" draw:name="footer-left-7" svg:x="0.5500in" svg:y="11.1600in" svg:width="2.8000in" svg:height="0.1800in">
          <draw:text-box>
            <text:p text:style-name="Small">みどりの輪だより　第12号</text:p>
          </draw:text-box>
        </draw:frame>
        <draw:frame draw:style-name="Frame" draw:name="footer-right-7" svg:x="6.4200in" svg:y="11.1600in" svg:width="1.3000in" svg:height="0.1800in">
          <draw:text-box>
            <text:p text:style-name="Small">2026年7月発行</text:p>
          </draw:text-box>
        </draw:frame>
      </draw:page>
      <draw:page draw:name="08-closing" draw:master-page-name="NewsletterMaster" draw:style-name="PageWhite">
        <draw:frame draw:style-name="Frame" draw:name="closing-photo" svg:x="0.0000in" svg:y="0.0000in" svg:width="8.2677in" svg:height="4.8000in">
          <draw:image xlink:href="Pictures/18BECA5175EC4719805A9C12916F7B57.jpg" xlink:type="simple" xlink:show="embed" xlink:actuate="onLoad"/>
        </draw:frame>
        <draw:frame draw:style-name="Frame" draw:name="closing-title" svg:x="0.7000in" svg:y="5.2500in" svg:width="4.8000in" svg:height="0.4800in">
          <draw:text-box>
            <text:p text:style-name="PageTitle">待つ時間も、育てる時間。</text:p>
          </draw:text-box>
        </draw:frame>
        <draw:frame draw:style-name="Frame" draw:name="closing-author" svg:x="0.7000in" svg:y="5.8800in" svg:width="1.6000in" svg:height="0.2000in">
          <draw:text-box>
            <text:p text:style-name="Small">文　編集担当</text:p>
          </draw:text-box>
        </draw:frame>
        <draw:frame draw:style-name="Frame" draw:name="closing-body" svg:x="0.7000in" svg:y="6.3400in" svg:width="6.8700in" svg:height="2.7200in">
          <draw:text-box>
            <text:p text:style-name="Body">庭の植物は、植えたその日に完成するわけではありません。雨が続く日も、思うように育たない時期もあります。それでも手入れを続けていると、少しずつ根を張り、次の季節に花を見せてくれます。</text:p>
            <text:p text:style-name="Body"/>
            <text:p text:style-name="Body">地域の活動も似ています。一度の催しで大きく変わらなくても、同じ場所で顔を合わせ、言葉を交わすことが、次の安心につながります。参加者が少ない日にも、その日にしかできない会話があります。</text:p>
            <text:p text:style-name="Body"/>
            <text:p text:style-name="Body">続けていると、以前は手伝ってもらう側だった方が、次には案内役になってくださることがあります。活動が受け継がれる瞬間は、数字には表れにくいものです。</text:p>
            <text:p text:style-name="Body"/>
            <text:p text:style-name="Body">急いで結果を求めすぎず、変えるべきところは丁寧に整える。そんな歩みを、これからも皆さんと続けていきたいと思います。次号は冬に発行予定です。秋の活動報告と、地域文庫の特集を掲載します。</text:p>
          </draw:text-box>
        </draw:frame>
        <draw:line draw:style-name="Rule" draw:name="closing-info-rule" svg:x1="0.7000in" svg:y1="10.0300in" svg:x2="7.5700in" svg:y2="10.0300in"/>
        <draw:frame draw:style-name="Frame" draw:name="closing-publisher" svg:x="0.7000in" svg:y="10.2000in" svg:width="3.4200in" svg:height="0.7800in">
          <draw:text-box>
            <text:p text:style-name="BodyTiny">みどりの輪だより　第12号</text:p>
            <text:p text:style-name="BodyTiny">発行：みどりの輪 編集部</text:p>
            <text:p text:style-name="BodyTiny">〒000-0000　○○県○○市○○町0-0</text:p>
            <text:p text:style-name="BodyTiny">TEL 000-0000-0000　info@example.jp</text:p>
          </draw:text-box>
        </draw:frame>
        <draw:frame draw:style-name="Frame" draw:name="closing-note" svg:x="4.3200in" svg:y="10.3100in" svg:width="3.2500in" svg:height="0.6000in">
          <draw:text-box>
            <text:p text:style-name="Small">この見本は寺院・地域団体・施設・教室などで共用できる汎用会報として制作しています。写真はWikimedia CommonsのPublic DomainおよびCC BY-SA素材を使用しています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office:version="1.2">
  <office:font-face-decls>
    <style:font-face style:name="Noto Sans CJK JP" svg:font-family="'Noto Sans CJK JP'" style:font-family-generic="swiss" style:font-pitch="variable"/>
  </office:font-face-decls>
  <office:styles/>
  <office:automatic-styles>
    <style:page-layout style:name="A4Portrait">
      <style:page-layout-properties fo:page-width="8.2677in" fo:page-height="11.6929in" style:print-orientation="portrait" fo:margin-top="0in" fo:margin-right="0in" fo:margin-bottom="0in" fo:margin-left="0in"/>
    </style:page-layout>
  </office:automatic-styles>
  <office:master-styles>
    <style:master-page style:name="NewsletterMaster" style:page-layout-name="A4Portrait" style:display-name="NewsletterMaster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