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Noto Sans CJK JP" svg:font-family="'Noto Sans CJK JP'" style:font-family-generic="swiss" style:font-pitch="variable"/>
  </office:font-face-decls>
  <office:automatic-styles>
    <style:style style:name="BCFrame" style:family="graphic" style:display-name="BCFrame">
      <style:graphic-properties draw:fill="none" draw:stroke="none"/>
    </style:style>
    <style:style style:name="BCCoral" style:family="graphic" style:display-name="BCCoral">
      <style:graphic-properties draw:fill="solid" draw:stroke="none" draw:fill-color="#E96543"/>
    </style:style>
    <style:style style:name="BCPale" style:family="graphic" style:display-name="BCPale">
      <style:graphic-properties draw:fill="solid" draw:stroke="none" draw:fill-color="#F3E8E2"/>
    </style:style>
    <style:style style:name="BCWhite" style:family="graphic" style:display-name="BCWhite">
      <style:graphic-properties draw:fill="solid" draw:stroke="none" draw:fill-color="#FFFFFF"/>
    </style:style>
    <style:style style:name="BCTrack" style:family="graphic" style:display-name="BCTrack">
      <style:graphic-properties draw:fill="solid" draw:stroke="none" draw:fill-color="#DDD8D3"/>
    </style:style>
    <style:style style:name="BCDark" style:family="graphic" style:display-name="BCDark">
      <style:graphic-properties draw:fill="solid" draw:stroke="none" draw:fill-color="#292624"/>
    </style:style>
    <style:style style:name="BCRule" style:family="graphic" style:display-name="BCRule">
      <style:graphic-properties draw:fill="none" draw:stroke="solid" svg:stroke-color="#302D2B" svg:stroke-width="0.8pt"/>
    </style:style>
    <style:style style:name="BCLabel" style:family="paragraph" style:display-name="BCLabel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9pt" style:font-size-asian="9pt" fo:font-weight="bold" style:font-weight-asian="bold" fo:color="#6D655F" fo:language="ja" fo:country="JP" style:language-asian="ja" style:country-asian="JP"/>
    </style:style>
    <style:style style:name="BCIndex" style:family="paragraph" style:display-name="BCIndex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34pt" style:font-size-asian="34pt" fo:font-weight="bold" style:font-weight-asian="bold" fo:color="#E96543" fo:language="ja" fo:country="JP" style:language-asian="ja" style:country-asian="JP"/>
    </style:style>
    <style:style style:name="BCTitle" style:family="paragraph" style:display-name="BCTitle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34pt" style:font-size-asian="34pt" fo:font-weight="bold" style:font-weight-asian="bold" fo:color="#24211F" fo:language="ja" fo:country="JP" style:language-asian="ja" style:country-asian="JP"/>
    </style:style>
    <style:style style:name="BCHeading" style:family="paragraph" style:display-name="BCHeading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24pt" style:font-size-asian="24pt" fo:font-weight="bold" style:font-weight-asian="bold" fo:color="#24211F" fo:language="ja" fo:country="JP" style:language-asian="ja" style:country-asian="JP"/>
    </style:style>
    <style:style style:name="BCBody" style:family="paragraph" style:display-name="BCBody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12pt" style:font-size-asian="12pt" fo:font-weight="normal" style:font-weight-asian="normal" fo:color="#403C39" fo:language="ja" fo:country="JP" style:language-asian="ja" style:country-asian="JP"/>
    </style:style>
    <style:style style:name="BCSmall" style:family="paragraph" style:display-name="BCSmall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9pt" style:font-size-asian="9pt" fo:font-weight="normal" style:font-weight-asian="normal" fo:color="#726B66" fo:language="ja" fo:country="JP" style:language-asian="ja" style:country-asian="JP"/>
    </style:style>
    <style:style style:name="BCMetric" style:family="paragraph" style:display-name="BCMetric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27pt" style:font-size-asian="27pt" fo:font-weight="bold" style:font-weight-asian="bold" fo:color="#E96543" fo:language="ja" fo:country="JP" style:language-asian="ja" style:country-asian="JP"/>
    </style:style>
    <style:style style:name="BCMetricLabel" style:family="paragraph" style:display-name="BCMetricLabel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10pt" style:font-size-asian="10pt" fo:font-weight="normal" style:font-weight-asian="normal" fo:color="#625C57" fo:language="ja" fo:country="JP" style:language-asian="ja" style:country-asian="JP"/>
    </style:style>
    <style:style style:name="BCStatus" style:family="paragraph" style:display-name="BCStatus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10pt" style:font-size-asian="10pt" fo:font-weight="bold" style:font-weight-asian="bold" fo:color="#403C39" fo:language="ja" fo:country="JP" style:language-asian="ja" style:country-asian="JP"/>
    </style:style>
    <style:style style:name="BCStatusCenter" style:family="paragraph" style:display-name="BCStatusCenter">
      <style:paragraph-properties fo:text-align="center" fo:margin-top="0in" fo:margin-bottom="0in" fo:line-height="115%"/>
      <style:text-properties style:font-name="Noto Sans CJK JP" style:font-name-asian="Noto Sans CJK JP" fo:font-family="'Noto Sans CJK JP'" style:font-family-asian="'Noto Sans CJK JP'" fo:font-size="10pt" style:font-size-asian="10pt" fo:font-weight="bold" style:font-weight-asian="bold" fo:color="#403C39" fo:language="ja" fo:country="JP" style:language-asian="ja" style:country-asian="JP"/>
    </style:style>
    <style:style style:name="BCSubhead" style:family="paragraph" style:display-name="BCSubhead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15pt" style:font-size-asian="15pt" fo:font-weight="bold" style:font-weight-asian="bold" fo:color="#403C39" fo:language="ja" fo:country="JP" style:language-asian="ja" style:country-asian="JP"/>
    </style:style>
    <style:style style:name="BCCoralSmall" style:family="paragraph" style:display-name="BCCoralSmall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10pt" style:font-size-asian="10pt" fo:font-weight="bold" style:font-weight-asian="bold" fo:color="#E96543" fo:language="ja" fo:country="JP" style:language-asian="ja" style:country-asian="JP"/>
    </style:style>
    <style:style style:name="BCCoralCenter" style:family="paragraph" style:display-name="BCCoralCenter">
      <style:paragraph-properties fo:text-align="center" fo:margin-top="0in" fo:margin-bottom="0in" fo:line-height="115%"/>
      <style:text-properties style:font-name="Noto Sans CJK JP" style:font-name-asian="Noto Sans CJK JP" fo:font-family="'Noto Sans CJK JP'" style:font-family-asian="'Noto Sans CJK JP'" fo:font-size="10pt" style:font-size-asian="10pt" fo:font-weight="bold" style:font-weight-asian="bold" fo:color="#E96543" fo:language="ja" fo:country="JP" style:language-asian="ja" style:country-asian="JP"/>
    </style:style>
    <style:style style:name="BCCenter" style:family="paragraph" style:display-name="BCCenter">
      <style:paragraph-properties fo:text-align="center" fo:margin-top="0in" fo:margin-bottom="0in" fo:line-height="115%"/>
      <style:text-properties style:font-name="Noto Sans CJK JP" style:font-name-asian="Noto Sans CJK JP" fo:font-family="'Noto Sans CJK JP'" style:font-family-asian="'Noto Sans CJK JP'" fo:font-size="13pt" style:font-size-asian="13pt" fo:font-weight="normal" style:font-weight-asian="normal" fo:color="#625C57" fo:language="ja" fo:country="JP" style:language-asian="ja" style:country-asian="JP"/>
    </style:style>
    <style:style style:name="BCSummaryLead" style:family="paragraph" style:display-name="BCSummaryLead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25pt" style:font-size-asian="25pt" fo:font-weight="bold" style:font-weight-asian="bold" fo:color="#24211F" fo:language="ja" fo:country="JP" style:language-asian="ja" style:country-asian="JP"/>
    </style:style>
    <style:style style:name="BCMessage" style:family="paragraph" style:display-name="BCMessage">
      <style:paragraph-properties fo:text-align="center" fo:margin-top="0in" fo:margin-bottom="0in" fo:line-height="115%"/>
      <style:text-properties style:font-name="Noto Sans CJK JP" style:font-name-asian="Noto Sans CJK JP" fo:font-family="'Noto Sans CJK JP'" style:font-family-asian="'Noto Sans CJK JP'" fo:font-size="30pt" style:font-size-asian="30pt" fo:font-weight="bold" style:font-weight-asian="bold" fo:color="#24211F" fo:language="ja" fo:country="JP" style:language-asian="ja" style:country-asian="JP"/>
    </style:style>
    <style:style style:name="BCMessageSub" style:family="paragraph" style:display-name="BCMessageSub">
      <style:paragraph-properties fo:text-align="center" fo:margin-top="0in" fo:margin-bottom="0in" fo:line-height="115%"/>
      <style:text-properties style:font-name="Noto Sans CJK JP" style:font-name-asian="Noto Sans CJK JP" fo:font-family="'Noto Sans CJK JP'" style:font-family-asian="'Noto Sans CJK JP'" fo:font-size="12pt" style:font-size-asian="12pt" fo:font-weight="normal" style:font-weight-asian="normal" fo:color="#625C57" fo:language="ja" fo:country="JP" style:language-asian="ja" style:country-asian="JP"/>
    </style:style>
    <style:style style:name="BCOrganization" style:family="paragraph" style:display-name="BCOrganization">
      <style:paragraph-properties fo:text-align="right" fo:margin-top="0in" fo:margin-bottom="0in" fo:line-height="115%"/>
      <style:text-properties style:font-name="Noto Sans CJK JP" style:font-name-asian="Noto Sans CJK JP" fo:font-family="'Noto Sans CJK JP'" style:font-family-asian="'Noto Sans CJK JP'" fo:font-size="9pt" style:font-size-asian="9pt" fo:font-weight="normal" style:font-weight-asian="normal" fo:color="#726B66" fo:language="ja" fo:country="JP" style:language-asian="ja" style:country-asian="JP"/>
    </style:style>
    <style:style style:name="BCPagebc-cover" style:family="graphic" style:display-name="BCPagebc-cover">
      <style:graphic-properties draw:fill="solid" draw:stroke="none" draw:fill-color="#F7F5F1"/>
    </style:style>
    <style:style style:name="BCPagebc-section" style:family="graphic" style:display-name="BCPagebc-section">
      <style:graphic-properties draw:fill="solid" draw:stroke="none" draw:fill-color="#F7F5F1"/>
    </style:style>
    <style:style style:name="BCPagebc-body" style:family="graphic" style:display-name="BCPagebc-body">
      <style:graphic-properties draw:fill="solid" draw:stroke="none" draw:fill-color="#F7F5F1"/>
    </style:style>
    <style:style style:name="BCPagebc-agenda" style:family="graphic" style:display-name="BCPagebc-agenda">
      <style:graphic-properties draw:fill="solid" draw:stroke="none" draw:fill-color="#F7F5F1"/>
    </style:style>
    <style:style style:name="BCPagebc-columns" style:family="graphic" style:display-name="BCPagebc-columns">
      <style:graphic-properties draw:fill="solid" draw:stroke="none" draw:fill-color="#F7F5F1"/>
    </style:style>
    <style:style style:name="BCPagebc-image-text" style:family="graphic" style:display-name="BCPagebc-image-text">
      <style:graphic-properties draw:fill="solid" draw:stroke="none" draw:fill-color="#F7F5F1"/>
    </style:style>
    <style:style style:name="BCPagebc-large-image" style:family="graphic" style:display-name="BCPagebc-large-image">
      <style:graphic-properties draw:fill="solid" draw:stroke="none" draw:fill-color="#F7F5F1"/>
    </style:style>
    <style:style style:name="BCPagebc-results" style:family="graphic" style:display-name="BCPagebc-results">
      <style:graphic-properties draw:fill="solid" draw:stroke="none" draw:fill-color="#F7F5F1"/>
    </style:style>
    <style:style style:name="BCPagebc-table" style:family="graphic" style:display-name="BCPagebc-table">
      <style:graphic-properties draw:fill="solid" draw:stroke="none" draw:fill-color="#F7F5F1"/>
    </style:style>
    <style:style style:name="BCPagebc-progress" style:family="graphic" style:display-name="BCPagebc-progress">
      <style:graphic-properties draw:fill="solid" draw:stroke="none" draw:fill-color="#F7F5F1"/>
    </style:style>
    <style:style style:name="BCPagebc-summary" style:family="graphic" style:display-name="BCPagebc-summary">
      <style:graphic-properties draw:fill="solid" draw:stroke="none" draw:fill-color="#F7F5F1"/>
    </style:style>
  </office:automatic-styles>
  <office:body>
    <office:presentation>
      <draw:page draw:name="bc-cover" draw:master-page-name="BCMaster" draw:style-name="BCPagebc-cover">
        <draw:frame draw:style-name="BCFrame" draw:name="organization-cover" svg:x="10.620in" svg:y="0.480in" svg:width="1.920in" svg:height="0.270in">
          <draw:text-box>
            <text:p text:style-name="BCOrganization">団体名</text:p>
          </draw:text-box>
        </draw:frame>
        <draw:frame draw:style-name="BCFrame" draw:name="label" svg:x="0.750in" svg:y="0.480in" svg:width="2.200in" svg:height="0.280in">
          <draw:text-box>
            <text:p text:style-name="BCLabel">B＋C  統合案</text:p>
          </draw:text-box>
        </draw:frame>
        <draw:frame draw:style-name="BCFrame" draw:name="index" svg:x="0.750in" svg:y="1.340in" svg:width="1.200in" svg:height="0.650in">
          <draw:text-box>
            <text:p text:style-name="BCIndex">01</text:p>
          </draw:text-box>
        </draw:frame>
        <draw:line draw:style-name="BCRule" draw:name="rule" svg:x1="2.250in" svg:y1="1.680in" svg:x2="12.550in" svg:y2="1.680in"/>
        <draw:frame draw:style-name="BCFrame" draw:name="title" svg:x="2.250in" svg:y="2.150in" svg:width="7.200in" svg:height="1.620in">
          <draw:text-box>
            <text:p text:style-name="BCTitle">地域交流会</text:p>
            <text:p text:style-name="BCTitle">実施報告</text:p>
          </draw:text-box>
        </draw:frame>
        <draw:frame draw:style-name="BCFrame" draw:name="subtitle" svg:x="2.300in" svg:y="4.200in" svg:width="5.800in" svg:height="0.380in">
          <draw:text-box>
            <text:p text:style-name="BCBody">実施結果・参加状況・次回への課題</text:p>
          </draw:text-box>
        </draw:frame>
        <draw:frame draw:style-name="BCFrame" draw:name="date" svg:x="2.300in" svg:y="6.400in" svg:width="1.700in" svg:height="0.280in">
          <draw:text-box>
            <text:p text:style-name="BCSmall">20 JUL 2026</text:p>
          </draw:text-box>
        </draw:frame>
      </draw:page>
      <draw:page draw:name="bc-section" draw:master-page-name="BCMaster" draw:style-name="BCPagebc-section">
        <draw:frame draw:style-name="BCFrame" draw:name="organization-section" svg:x="10.620in" svg:y="0.480in" svg:width="1.920in" svg:height="0.270in">
          <draw:text-box>
            <text:p text:style-name="BCOrganization">団体名</text:p>
          </draw:text-box>
        </draw:frame>
        <draw:frame draw:style-name="BCFrame" draw:name="section-index" svg:x="0.780in" svg:y="0.580in" svg:width="1.400in" svg:height="0.680in">
          <draw:text-box>
            <text:p text:style-name="BCIndex">02</text:p>
          </draw:text-box>
        </draw:frame>
        <draw:frame draw:style-name="BCFrame" draw:name="section-label" svg:x="5.380in" svg:y="1.720in" svg:width="2.550in" svg:height="0.300in">
          <draw:text-box>
            <text:p text:style-name="BCCoralCenter">CORE VALUE</text:p>
          </draw:text-box>
        </draw:frame>
        <draw:frame draw:style-name="BCFrame" draw:name="section-message" svg:x="2.080in" svg:y="2.520in" svg:width="9.180in" svg:height="1.450in">
          <draw:text-box>
            <text:p text:style-name="BCMessage">地域のつながりは、</text:p>
            <text:p text:style-name="BCMessage">顔を合わせることから始まる。</text:p>
          </draw:text-box>
        </draw:frame>
        <draw:frame draw:style-name="BCFrame" draw:name="section-copy" svg:x="3.000in" svg:y="4.620in" svg:width="7.350in" svg:height="0.360in">
          <draw:text-box>
            <text:p text:style-name="BCMessageSub">一度の行事ではなく、次の会話が生まれる場をつくる。</text:p>
          </draw:text-box>
        </draw:frame>
      </draw:page>
      <draw:page draw:name="bc-body" draw:master-page-name="BCMaster" draw:style-name="BCPagebc-body">
        <draw:frame draw:style-name="BCFrame" draw:name="organization-body" svg:x="10.620in" svg:y="0.480in" svg:width="1.920in" svg:height="0.270in">
          <draw:text-box>
            <text:p text:style-name="BCOrganization">団体名</text:p>
          </draw:text-box>
        </draw:frame>
        <draw:frame draw:style-name="BCFrame" draw:name="body-index" svg:x="0.750in" svg:y="0.470in" svg:width="1.150in" svg:height="0.620in">
          <draw:text-box>
            <text:p text:style-name="BCIndex">03</text:p>
          </draw:text-box>
        </draw:frame>
        <draw:frame draw:style-name="BCFrame" draw:name="body-title" svg:x="1.650in" svg:y="0.610in" svg:width="6.200in" svg:height="0.480in">
          <draw:text-box>
            <text:p text:style-name="BCHeading">開催の目的</text:p>
          </draw:text-box>
        </draw:frame>
        <draw:line draw:style-name="BCRule" draw:name="body-rule" svg:x1="1.650in" svg:y1="1.350in" svg:x2="12.620in" svg:y2="1.350in"/>
        <draw:frame draw:style-name="BCFrame" draw:name="body-lead" svg:x="0.820in" svg:y="2.020in" svg:width="5.400in" svg:height="1.200in">
          <draw:text-box>
            <text:p text:style-name="BCSubhead">地域で顔を合わせる機会をつくり、</text:p>
            <text:p text:style-name="BCSubhead">世代や所属を越えた関係を育てる。</text:p>
          </draw:text-box>
        </draw:frame>
        <draw:frame draw:style-name="BCFrame" draw:name="body-copy" svg:x="6.300in" svg:y="2.050in" svg:width="5.750in" svg:height="2.350in">
          <draw:text-box>
            <text:p text:style-name="BCBody">行事そのものを目的にするのではなく、日常の中で声を掛け合える関係を増やすことを目指しました。参加者が無理なく会話を始められるよう、受付・会場配置・企画の順序を整えています。</text:p>
          </draw:text-box>
        </draw:frame>
        <draw:rect draw:style-name="BCCoral" draw:name="body-note-rule" svg:x="6.300in" svg:y="5.550in" svg:width="0.060in" svg:height="0.620in"/>
        <draw:frame draw:style-name="BCFrame" draw:name="body-note-label" svg:x="6.600in" svg:y="5.700in" svg:width="0.720in" svg:height="0.260in">
          <draw:text-box>
            <text:p text:style-name="BCCoralSmall">補足</text:p>
          </draw:text-box>
        </draw:frame>
        <draw:frame draw:style-name="BCFrame" draw:name="body-note-text" svg:x="7.340in" svg:y="5.690in" svg:width="4.930in" svg:height="0.280in">
          <draw:text-box>
            <text:p text:style-name="BCSmall">目的は一文で伝えられる長さにする</text:p>
          </draw:text-box>
        </draw:frame>
        <draw:frame draw:style-name="BCFrame" draw:name="body-footer" svg:x="0.800in" svg:y="6.680in" svg:width="2.400in" svg:height="0.250in">
          <draw:text-box>
            <text:p text:style-name="BCSmall">地域交流会 実施報告</text:p>
          </draw:text-box>
        </draw:frame>
      </draw:page>
      <draw:page draw:name="bc-agenda" draw:master-page-name="BCMaster" draw:style-name="BCPagebc-agenda">
        <draw:frame draw:style-name="BCFrame" draw:name="organization-agenda" svg:x="10.620in" svg:y="0.480in" svg:width="1.920in" svg:height="0.270in">
          <draw:text-box>
            <text:p text:style-name="BCOrganization">団体名</text:p>
          </draw:text-box>
        </draw:frame>
        <draw:frame draw:style-name="BCFrame" draw:name="agenda-index" svg:x="0.750in" svg:y="0.470in" svg:width="1.150in" svg:height="0.620in">
          <draw:text-box>
            <text:p text:style-name="BCIndex">04</text:p>
          </draw:text-box>
        </draw:frame>
        <draw:frame draw:style-name="BCFrame" draw:name="agenda-title" svg:x="1.650in" svg:y="0.610in" svg:width="6.200in" svg:height="0.480in">
          <draw:text-box>
            <text:p text:style-name="BCHeading">本日の内容</text:p>
          </draw:text-box>
        </draw:frame>
        <draw:line draw:style-name="BCRule" draw:name="agenda-rule" svg:x1="1.650in" svg:y1="1.350in" svg:x2="12.620in" svg:y2="1.350in"/>
        <draw:frame draw:style-name="BCFrame" draw:name="agenda-num-0" svg:x="0.820in" svg:y="1.830in" svg:width="0.700in" svg:height="0.320in">
          <draw:text-box>
            <text:p text:style-name="BCCoralSmall">01</text:p>
          </draw:text-box>
        </draw:frame>
        <draw:frame draw:style-name="BCFrame" draw:name="agenda-head-0" svg:x="1.780in" svg:y="1.810in" svg:width="2.450in" svg:height="0.350in">
          <draw:text-box>
            <text:p text:style-name="BCSubhead">開催概要</text:p>
          </draw:text-box>
        </draw:frame>
        <draw:line draw:style-name="BCRule" draw:name="agenda-line-0" svg:x1="4.520in" svg:y1="2.070in" svg:x2="8.220in" svg:y2="2.070in"/>
        <draw:frame draw:style-name="BCFrame" draw:name="agenda-detail-0" svg:x="8.580in" svg:y="1.830in" svg:width="2.650in" svg:height="0.300in">
          <draw:text-box>
            <text:p text:style-name="BCBody">目的・日時・会場</text:p>
          </draw:text-box>
        </draw:frame>
        <draw:frame draw:style-name="BCFrame" draw:name="agenda-num-1" svg:x="0.820in" svg:y="2.910in" svg:width="0.700in" svg:height="0.320in">
          <draw:text-box>
            <text:p text:style-name="BCCoralSmall">02</text:p>
          </draw:text-box>
        </draw:frame>
        <draw:frame draw:style-name="BCFrame" draw:name="agenda-head-1" svg:x="1.780in" svg:y="2.890in" svg:width="2.450in" svg:height="0.350in">
          <draw:text-box>
            <text:p text:style-name="BCSubhead">当日の様子</text:p>
          </draw:text-box>
        </draw:frame>
        <draw:line draw:style-name="BCRule" draw:name="agenda-line-1" svg:x1="4.520in" svg:y1="3.150in" svg:x2="8.220in" svg:y2="3.150in"/>
        <draw:frame draw:style-name="BCFrame" draw:name="agenda-detail-1" svg:x="8.580in" svg:y="2.910in" svg:width="2.650in" svg:height="0.300in">
          <draw:text-box>
            <text:p text:style-name="BCBody">写真と参加者の声</text:p>
          </draw:text-box>
        </draw:frame>
        <draw:frame draw:style-name="BCFrame" draw:name="agenda-num-2" svg:x="0.820in" svg:y="3.990in" svg:width="0.700in" svg:height="0.320in">
          <draw:text-box>
            <text:p text:style-name="BCCoralSmall">03</text:p>
          </draw:text-box>
        </draw:frame>
        <draw:frame draw:style-name="BCFrame" draw:name="agenda-head-2" svg:x="1.780in" svg:y="3.970in" svg:width="2.450in" svg:height="0.350in">
          <draw:text-box>
            <text:p text:style-name="BCSubhead">実施結果</text:p>
          </draw:text-box>
        </draw:frame>
        <draw:line draw:style-name="BCRule" draw:name="agenda-line-2" svg:x1="4.520in" svg:y1="4.230in" svg:x2="8.220in" svg:y2="4.230in"/>
        <draw:frame draw:style-name="BCFrame" draw:name="agenda-detail-2" svg:x="8.580in" svg:y="3.990in" svg:width="2.650in" svg:height="0.300in">
          <draw:text-box>
            <text:p text:style-name="BCBody">数字・評価・課題</text:p>
          </draw:text-box>
        </draw:frame>
        <draw:frame draw:style-name="BCFrame" draw:name="agenda-num-3" svg:x="0.820in" svg:y="5.070in" svg:width="0.700in" svg:height="0.320in">
          <draw:text-box>
            <text:p text:style-name="BCCoralSmall">04</text:p>
          </draw:text-box>
        </draw:frame>
        <draw:frame draw:style-name="BCFrame" draw:name="agenda-head-3" svg:x="1.780in" svg:y="5.050in" svg:width="2.450in" svg:height="0.350in">
          <draw:text-box>
            <text:p text:style-name="BCSubhead">次の行動</text:p>
          </draw:text-box>
        </draw:frame>
        <draw:line draw:style-name="BCRule" draw:name="agenda-line-3" svg:x1="4.520in" svg:y1="5.310in" svg:x2="8.220in" svg:y2="5.310in"/>
        <draw:frame draw:style-name="BCFrame" draw:name="agenda-detail-3" svg:x="8.580in" svg:y="5.070in" svg:width="2.650in" svg:height="0.300in">
          <draw:text-box>
            <text:p text:style-name="BCBody">改善点と担当</text:p>
          </draw:text-box>
        </draw:frame>
        <draw:frame draw:style-name="BCFrame" draw:name="agenda-footer" svg:x="0.800in" svg:y="6.680in" svg:width="2.400in" svg:height="0.250in">
          <draw:text-box>
            <text:p text:style-name="BCSmall">地域交流会 実施報告</text:p>
          </draw:text-box>
        </draw:frame>
      </draw:page>
      <draw:page draw:name="bc-columns" draw:master-page-name="BCMaster" draw:style-name="BCPagebc-columns">
        <draw:frame draw:style-name="BCFrame" draw:name="organization-columns" svg:x="10.620in" svg:y="0.480in" svg:width="1.920in" svg:height="0.270in">
          <draw:text-box>
            <text:p text:style-name="BCOrganization">団体名</text:p>
          </draw:text-box>
        </draw:frame>
        <draw:frame draw:style-name="BCFrame" draw:name="columns-index" svg:x="0.750in" svg:y="0.470in" svg:width="1.150in" svg:height="0.620in">
          <draw:text-box>
            <text:p text:style-name="BCIndex">05</text:p>
          </draw:text-box>
        </draw:frame>
        <draw:frame draw:style-name="BCFrame" draw:name="columns-title" svg:x="1.650in" svg:y="0.610in" svg:width="6.200in" svg:height="0.480in">
          <draw:text-box>
            <text:p text:style-name="BCHeading">成果と課題</text:p>
          </draw:text-box>
        </draw:frame>
        <draw:line draw:style-name="BCRule" draw:name="columns-rule" svg:x1="1.650in" svg:y1="1.350in" svg:x2="12.620in" svg:y2="1.350in"/>
        <draw:frame draw:style-name="BCFrame" draw:name="columns-left-label" svg:x="0.820in" svg:y="1.940in" svg:width="2.200in" svg:height="0.380in">
          <draw:text-box>
            <text:p text:style-name="BCSubhead">できたこと</text:p>
          </draw:text-box>
        </draw:frame>
        <draw:rect draw:style-name="BCCoral" draw:name="columns-left-accent" svg:x="0.820in" svg:y="2.520in" svg:width="0.080in" svg:height="2.850in"/>
        <draw:frame draw:style-name="BCFrame" draw:name="columns-left-copy" svg:x="1.180in" svg:y="2.500in" svg:width="4.550in" svg:height="2.720in">
          <draw:text-box>
            <text:p text:style-name="BCBody">• 世代を越えた会話が生まれた</text:p>
            <text:p text:style-name="BCBody"/>
            <text:p text:style-name="BCBody">• 地域団体の協力が得られた</text:p>
            <text:p text:style-name="BCBody"/>
            <text:p text:style-name="BCBody">• 予定時間内に進行できた</text:p>
          </draw:text-box>
        </draw:frame>
        <draw:frame draw:style-name="BCFrame" draw:name="columns-right-label" svg:x="6.720in" svg:y="1.940in" svg:width="2.800in" svg:height="0.380in">
          <draw:text-box>
            <text:p text:style-name="BCSubhead">改善したいこと</text:p>
          </draw:text-box>
        </draw:frame>
        <draw:rect draw:style-name="BCDark" draw:name="columns-right-accent" svg:x="6.720in" svg:y="2.520in" svg:width="0.080in" svg:height="2.850in"/>
        <draw:frame draw:style-name="BCFrame" draw:name="columns-right-copy" svg:x="7.080in" svg:y="2.500in" svg:width="4.550in" svg:height="2.720in">
          <draw:text-box>
            <text:p text:style-name="BCBody">• 受付周辺の混雑を減らす</text:p>
            <text:p text:style-name="BCBody"/>
            <text:p text:style-name="BCBody">• 高齢者向け案内を増やす</text:p>
            <text:p text:style-name="BCBody"/>
            <text:p text:style-name="BCBody">• 写真記録の担当を明確にする</text:p>
          </draw:text-box>
        </draw:frame>
        <draw:frame draw:style-name="BCFrame" draw:name="columns-footer" svg:x="0.800in" svg:y="6.680in" svg:width="2.400in" svg:height="0.250in">
          <draw:text-box>
            <text:p text:style-name="BCSmall">地域交流会 実施報告</text:p>
          </draw:text-box>
        </draw:frame>
      </draw:page>
      <draw:page draw:name="bc-image-text" draw:master-page-name="BCMaster" draw:style-name="BCPagebc-image-text">
        <draw:frame draw:style-name="BCFrame" draw:name="organization-image-text" svg:x="10.620in" svg:y="0.480in" svg:width="1.920in" svg:height="0.270in">
          <draw:text-box>
            <text:p text:style-name="BCOrganization">団体名</text:p>
          </draw:text-box>
        </draw:frame>
        <draw:frame draw:style-name="BCFrame" draw:name="image-index" svg:x="0.750in" svg:y="0.470in" svg:width="1.150in" svg:height="0.620in">
          <draw:text-box>
            <text:p text:style-name="BCIndex">06</text:p>
          </draw:text-box>
        </draw:frame>
        <draw:frame draw:style-name="BCFrame" draw:name="image-title" svg:x="1.650in" svg:y="0.610in" svg:width="6.200in" svg:height="0.480in">
          <draw:text-box>
            <text:p text:style-name="BCHeading">当日の様子</text:p>
          </draw:text-box>
        </draw:frame>
        <draw:line draw:style-name="BCRule" draw:name="image-rule" svg:x1="1.650in" svg:y1="1.350in" svg:x2="12.620in" svg:y2="1.350in"/>
        <draw:rect draw:style-name="BCPale" draw:name="image-placeholder" svg:x="0.780in" svg:y="1.860in" svg:width="6.420in" svg:height="4.000in"/>
        <draw:frame draw:style-name="BCFrame" draw:name="image-placeholder-label" svg:x="3.500in" svg:y="3.660in" svg:width="1.000in" svg:height="0.350in">
          <draw:text-box>
            <text:p text:style-name="BCCenter">写真</text:p>
          </draw:text-box>
        </draw:frame>
        <draw:frame draw:style-name="BCFrame" draw:name="image-copy-head" svg:x="7.750in" svg:y="2.020in" svg:width="4.300in" svg:height="0.420in">
          <draw:text-box>
            <text:p text:style-name="BCSubhead">会話が自然に始まる配置</text:p>
          </draw:text-box>
        </draw:frame>
        <draw:frame draw:style-name="BCFrame" draw:name="image-copy" svg:x="7.750in" svg:y="2.730in" svg:width="4.300in" svg:height="2.120in">
          <draw:text-box>
            <text:p text:style-name="BCBody">椅子を向かい合わせすぎず、立ち話もしやすい余白を確保しました。</text:p>
            <text:p text:style-name="BCBody"/>
            <text:p text:style-name="BCBody">写真と短い説明を組み合わせ、状況と意味を一緒に伝えます。</text:p>
          </draw:text-box>
        </draw:frame>
        <draw:rect draw:style-name="BCCoral" draw:name="image-caption-rule" svg:x="7.750in" svg:y="5.330in" svg:width="3.850in" svg:height="0.060in"/>
        <draw:frame draw:style-name="BCFrame" draw:name="image-caption" svg:x="7.750in" svg:y="5.580in" svg:width="3.300in" svg:height="0.280in">
          <draw:text-box>
            <text:p text:style-name="BCSmall">会場中央の交流スペース</text:p>
          </draw:text-box>
        </draw:frame>
      </draw:page>
      <draw:page draw:name="bc-large-image" draw:master-page-name="BCMaster" draw:style-name="BCPagebc-large-image">
        <draw:frame draw:style-name="BCFrame" draw:name="organization-large-image" svg:x="10.620in" svg:y="0.480in" svg:width="1.920in" svg:height="0.270in">
          <draw:text-box>
            <text:p text:style-name="BCOrganization">団体名</text:p>
          </draw:text-box>
        </draw:frame>
        <draw:frame draw:style-name="BCFrame" draw:name="large-image-index" svg:x="0.750in" svg:y="0.470in" svg:width="1.150in" svg:height="0.620in">
          <draw:text-box>
            <text:p text:style-name="BCIndex">07</text:p>
          </draw:text-box>
        </draw:frame>
        <draw:frame draw:style-name="BCFrame" draw:name="large-image-title" svg:x="1.650in" svg:y="0.610in" svg:width="6.200in" svg:height="0.480in">
          <draw:text-box>
            <text:p text:style-name="BCHeading">活動記録</text:p>
          </draw:text-box>
        </draw:frame>
        <draw:line draw:style-name="BCRule" draw:name="large-image-rule" svg:x1="1.650in" svg:y1="1.350in" svg:x2="12.620in" svg:y2="1.350in"/>
        <draw:rect draw:style-name="BCPale" draw:name="large-image-placeholder" svg:x="0.780in" svg:y="1.780in" svg:width="11.780in" svg:height="4.480in"/>
        <draw:frame draw:style-name="BCFrame" draw:name="large-image-label" svg:x="5.620in" svg:y="3.820in" svg:width="2.000in" svg:height="0.380in">
          <draw:text-box>
            <text:p text:style-name="BCCenter">横長写真</text:p>
          </draw:text-box>
        </draw:frame>
        <draw:frame draw:style-name="BCFrame" draw:name="large-image-caption" svg:x="0.800in" svg:y="6.430in" svg:width="6.700in" svg:height="0.280in">
          <draw:text-box>
            <text:p text:style-name="BCSmall">受付開始から30分後。会場全体に会話が広がった時間帯。</text:p>
          </draw:text-box>
        </draw:frame>
      </draw:page>
      <draw:page draw:name="bc-results" draw:master-page-name="BCMaster" draw:style-name="BCPagebc-results">
        <draw:frame draw:style-name="BCFrame" draw:name="organization-results" svg:x="10.620in" svg:y="0.480in" svg:width="1.920in" svg:height="0.270in">
          <draw:text-box>
            <text:p text:style-name="BCOrganization">団体名</text:p>
          </draw:text-box>
        </draw:frame>
        <draw:frame draw:style-name="BCFrame" draw:name="index" svg:x="0.750in" svg:y="0.470in" svg:width="1.150in" svg:height="0.620in">
          <draw:text-box>
            <text:p text:style-name="BCIndex">08</text:p>
          </draw:text-box>
        </draw:frame>
        <draw:frame draw:style-name="BCFrame" draw:name="title" svg:x="1.650in" svg:y="0.610in" svg:width="5.200in" svg:height="0.480in">
          <draw:text-box>
            <text:p text:style-name="BCHeading">実施結果</text:p>
          </draw:text-box>
        </draw:frame>
        <draw:line draw:style-name="BCRule" draw:name="rule" svg:x1="1.650in" svg:y1="1.350in" svg:x2="12.620in" svg:y2="1.350in"/>
        <draw:rect draw:style-name="BCWhite" draw:name="metric-bg-0" svg:x="0.750in" svg:y="2.020in" svg:width="3.550in" svg:height="1.480in"/>
        <draw:rect draw:style-name="BCCoral" draw:name="metric-accent-0" svg:x="0.750in" svg:y="2.020in" svg:width="0.080in" svg:height="1.480in"/>
        <draw:frame draw:style-name="BCFrame" draw:name="metric-value-0" svg:x="1.090in" svg:y="2.340in" svg:width="1.650in" svg:height="0.520in">
          <draw:text-box>
            <text:p text:style-name="BCMetric">86名</text:p>
          </draw:text-box>
        </draw:frame>
        <draw:frame draw:style-name="BCFrame" draw:name="metric-label-0" svg:x="2.800in" svg:y="2.520in" svg:width="1.080in" svg:height="0.300in">
          <draw:text-box>
            <text:p text:style-name="BCMetricLabel">参加者</text:p>
          </draw:text-box>
        </draw:frame>
        <draw:rect draw:style-name="BCWhite" draw:name="metric-bg-1" svg:x="4.780in" svg:y="2.020in" svg:width="3.550in" svg:height="1.480in"/>
        <draw:rect draw:style-name="BCCoral" draw:name="metric-accent-1" svg:x="4.780in" svg:y="2.020in" svg:width="0.080in" svg:height="1.480in"/>
        <draw:frame draw:style-name="BCFrame" draw:name="metric-value-1" svg:x="5.120in" svg:y="2.340in" svg:width="1.650in" svg:height="0.520in">
          <draw:text-box>
            <text:p text:style-name="BCMetric">7団体</text:p>
          </draw:text-box>
        </draw:frame>
        <draw:frame draw:style-name="BCFrame" draw:name="metric-label-1" svg:x="6.830in" svg:y="2.520in" svg:width="1.080in" svg:height="0.300in">
          <draw:text-box>
            <text:p text:style-name="BCMetricLabel">協力団体</text:p>
          </draw:text-box>
        </draw:frame>
        <draw:rect draw:style-name="BCWhite" draw:name="metric-bg-2" svg:x="8.810in" svg:y="2.020in" svg:width="3.550in" svg:height="1.480in"/>
        <draw:rect draw:style-name="BCCoral" draw:name="metric-accent-2" svg:x="8.810in" svg:y="2.020in" svg:width="0.080in" svg:height="1.480in"/>
        <draw:frame draw:style-name="BCFrame" draw:name="metric-value-2" svg:x="9.150in" svg:y="2.340in" svg:width="1.650in" svg:height="0.520in">
          <draw:text-box>
            <text:p text:style-name="BCMetric">92%</text:p>
          </draw:text-box>
        </draw:frame>
        <draw:frame draw:style-name="BCFrame" draw:name="metric-label-2" svg:x="10.860in" svg:y="2.520in" svg:width="1.080in" svg:height="0.300in">
          <draw:text-box>
            <text:p text:style-name="BCMetricLabel">満足度</text:p>
          </draw:text-box>
        </draw:frame>
        <draw:frame draw:style-name="BCFrame" draw:name="summary-head" svg:x="0.780in" svg:y="4.270in" svg:width="5.500in" svg:height="0.480in">
          <draw:text-box>
            <text:p text:style-name="BCHeading">このページで伝えること</text:p>
          </draw:text-box>
        </draw:frame>
        <draw:frame draw:style-name="BCFrame" draw:name="summary" svg:x="0.800in" svg:y="5.030in" svg:width="7.350in" svg:height="1.050in">
          <draw:text-box>
            <text:p text:style-name="BCBody">主要な数字を最初に見せ、下段で意味を短く説明します。</text:p>
            <text:p text:style-name="BCBody">表やグラフを置いても、B案の余白と読みやすさを保ちます。</text:p>
          </draw:text-box>
        </draw:frame>
        <draw:rect draw:style-name="BCPale" draw:name="summary-mark" svg:x="10.500in" svg:y="4.480in" svg:width="2.050in" svg:height="1.550in"/>
        <draw:frame draw:style-name="BCFrame" draw:name="summary-mark-text" svg:x="10.680in" svg:y="4.880in" svg:width="1.690in" svg:height="0.700in">
          <draw:text-box>
            <text:p text:style-name="BCStatusCenter">要点を</text:p>
            <text:p text:style-name="BCStatusCenter">ひとつに絞る</text:p>
          </draw:text-box>
        </draw:frame>
      </draw:page>
      <draw:page draw:name="bc-table" draw:master-page-name="BCMaster" draw:style-name="BCPagebc-table">
        <draw:frame draw:style-name="BCFrame" draw:name="organization-table" svg:x="10.620in" svg:y="0.480in" svg:width="1.920in" svg:height="0.270in">
          <draw:text-box>
            <text:p text:style-name="BCOrganization">団体名</text:p>
          </draw:text-box>
        </draw:frame>
        <draw:frame draw:style-name="BCFrame" draw:name="table-index" svg:x="0.750in" svg:y="0.470in" svg:width="1.150in" svg:height="0.620in">
          <draw:text-box>
            <text:p text:style-name="BCIndex">09</text:p>
          </draw:text-box>
        </draw:frame>
        <draw:frame draw:style-name="BCFrame" draw:name="table-title" svg:x="1.650in" svg:y="0.610in" svg:width="6.500in" svg:height="0.480in">
          <draw:text-box>
            <text:p text:style-name="BCHeading">実施前後の比較</text:p>
          </draw:text-box>
        </draw:frame>
        <draw:line draw:style-name="BCRule" draw:name="table-rule" svg:x1="1.650in" svg:y1="1.350in" svg:x2="12.620in" svg:y2="1.350in"/>
        <draw:frame draw:style-name="BCFrame" draw:name="table-head-項目" svg:x="0.780in" svg:y="1.780in" svg:width="2.100in" svg:height="0.320in">
          <draw:text-box>
            <text:p text:style-name="BCStatus">項目</text:p>
          </draw:text-box>
        </draw:frame>
        <draw:frame draw:style-name="BCFrame" draw:name="table-head-実施前" svg:x="4.100in" svg:y="1.780in" svg:width="2.650in" svg:height="0.320in">
          <draw:text-box>
            <text:p text:style-name="BCStatus">実施前</text:p>
          </draw:text-box>
        </draw:frame>
        <draw:frame draw:style-name="BCFrame" draw:name="table-head-実施後" svg:x="7.150in" svg:y="1.780in" svg:width="2.650in" svg:height="0.320in">
          <draw:text-box>
            <text:p text:style-name="BCStatus">実施後</text:p>
          </draw:text-box>
        </draw:frame>
        <draw:frame draw:style-name="BCFrame" draw:name="table-head-評価" svg:x="10.200in" svg:y="1.780in" svg:width="1.650in" svg:height="0.320in">
          <draw:text-box>
            <text:p text:style-name="BCStatus">評価</text:p>
          </draw:text-box>
        </draw:frame>
        <draw:line draw:style-name="BCRule" draw:name="table-head-line" svg:x1="0.780in" svg:y1="2.250in" svg:x2="12.120in" svg:y2="2.250in"/>
        <draw:rect draw:style-name="BCWhite" draw:name="table-row-bg-0" svg:x="0.750in" svg:y="2.440in" svg:width="11.600in" svg:height="0.720in"/>
        <draw:frame draw:style-name="BCFrame" draw:name="table-cell-0-0" svg:x="0.820in" svg:y="2.620in" svg:width="2.800in" svg:height="0.300in">
          <draw:text-box>
            <text:p text:style-name="BCBody">地域団体との連携</text:p>
          </draw:text-box>
        </draw:frame>
        <draw:frame draw:style-name="BCFrame" draw:name="table-cell-0-1" svg:x="4.100in" svg:y="2.620in" svg:width="2.600in" svg:height="0.300in">
          <draw:text-box>
            <text:p text:style-name="BCBody">個別連絡</text:p>
          </draw:text-box>
        </draw:frame>
        <draw:frame draw:style-name="BCFrame" draw:name="table-cell-0-2" svg:x="7.150in" svg:y="2.620in" svg:width="2.600in" svg:height="0.300in">
          <draw:text-box>
            <text:p text:style-name="BCBody">7団体が協力</text:p>
          </draw:text-box>
        </draw:frame>
        <draw:frame draw:style-name="BCFrame" draw:name="table-cell-0-3" svg:x="10.200in" svg:y="2.620in" svg:width="1.350in" svg:height="0.300in">
          <draw:text-box>
            <text:p text:style-name="BCCoralSmall">改善</text:p>
          </draw:text-box>
        </draw:frame>
        <draw:frame draw:style-name="BCFrame" draw:name="table-cell-1-0" svg:x="0.820in" svg:y="3.620in" svg:width="2.800in" svg:height="0.300in">
          <draw:text-box>
            <text:p text:style-name="BCBody">参加者案内</text:p>
          </draw:text-box>
        </draw:frame>
        <draw:frame draw:style-name="BCFrame" draw:name="table-cell-1-1" svg:x="4.100in" svg:y="3.620in" svg:width="2.600in" svg:height="0.300in">
          <draw:text-box>
            <text:p text:style-name="BCBody">紙のみ</text:p>
          </draw:text-box>
        </draw:frame>
        <draw:frame draw:style-name="BCFrame" draw:name="table-cell-1-2" svg:x="7.150in" svg:y="3.620in" svg:width="2.600in" svg:height="0.300in">
          <draw:text-box>
            <text:p text:style-name="BCBody">紙＋会場掲示</text:p>
          </draw:text-box>
        </draw:frame>
        <draw:frame draw:style-name="BCFrame" draw:name="table-cell-1-3" svg:x="10.200in" svg:y="3.620in" svg:width="1.350in" svg:height="0.300in">
          <draw:text-box>
            <text:p text:style-name="BCCoralSmall">改善</text:p>
          </draw:text-box>
        </draw:frame>
        <draw:rect draw:style-name="BCWhite" draw:name="table-row-bg-2" svg:x="0.750in" svg:y="4.440in" svg:width="11.600in" svg:height="0.720in"/>
        <draw:frame draw:style-name="BCFrame" draw:name="table-cell-2-0" svg:x="0.820in" svg:y="4.620in" svg:width="2.800in" svg:height="0.300in">
          <draw:text-box>
            <text:p text:style-name="BCBody">記録方法</text:p>
          </draw:text-box>
        </draw:frame>
        <draw:frame draw:style-name="BCFrame" draw:name="table-cell-2-1" svg:x="4.100in" svg:y="4.620in" svg:width="2.600in" svg:height="0.300in">
          <draw:text-box>
            <text:p text:style-name="BCBody">担当不明確</text:p>
          </draw:text-box>
        </draw:frame>
        <draw:frame draw:style-name="BCFrame" draw:name="table-cell-2-2" svg:x="7.150in" svg:y="4.620in" svg:width="2.600in" svg:height="0.300in">
          <draw:text-box>
            <text:p text:style-name="BCBody">写真担当を配置</text:p>
          </draw:text-box>
        </draw:frame>
        <draw:frame draw:style-name="BCFrame" draw:name="table-cell-2-3" svg:x="10.200in" svg:y="4.620in" svg:width="1.350in" svg:height="0.300in">
          <draw:text-box>
            <text:p text:style-name="BCCoralSmall">定着</text:p>
          </draw:text-box>
        </draw:frame>
        <draw:frame draw:style-name="BCFrame" draw:name="table-note" svg:x="0.800in" svg:y="5.450in" svg:width="6.200in" svg:height="0.300in">
          <draw:text-box>
            <text:p text:style-name="BCSmall">比較軸を増やしすぎず、判断に必要な項目だけを残します。</text:p>
          </draw:text-box>
        </draw:frame>
      </draw:page>
      <draw:page draw:name="bc-progress" draw:master-page-name="BCMaster" draw:style-name="BCPagebc-progress">
        <draw:frame draw:style-name="BCFrame" draw:name="organization-progress" svg:x="10.620in" svg:y="0.480in" svg:width="1.920in" svg:height="0.270in">
          <draw:text-box>
            <text:p text:style-name="BCOrganization">団体名</text:p>
          </draw:text-box>
        </draw:frame>
        <draw:frame draw:style-name="BCFrame" draw:name="index" svg:x="0.750in" svg:y="0.470in" svg:width="1.150in" svg:height="0.620in">
          <draw:text-box>
            <text:p text:style-name="BCIndex">10</text:p>
          </draw:text-box>
        </draw:frame>
        <draw:frame draw:style-name="BCFrame" draw:name="title" svg:x="1.650in" svg:y="0.610in" svg:width="7.400in" svg:height="0.480in">
          <draw:text-box>
            <text:p text:style-name="BCHeading">次回に向けた進行状況</text:p>
          </draw:text-box>
        </draw:frame>
        <draw:line draw:style-name="BCRule" draw:name="rule" svg:x1="1.650in" svg:y1="1.350in" svg:x2="12.620in" svg:y2="1.350in"/>
        <draw:frame draw:style-name="BCFrame" draw:name="row-label-0" svg:x="0.800in" svg:y="2.050in" svg:width="2.000in" svg:height="0.300in">
          <draw:text-box>
            <text:p text:style-name="BCBody">会場準備</text:p>
          </draw:text-box>
        </draw:frame>
        <draw:rect draw:style-name="BCTrack" draw:name="row-track-0" svg:x="3.000in" svg:y="2.130in" svg:width="6.150in" svg:height="0.150in"/>
        <draw:rect draw:style-name="BCCoral" draw:name="row-fill-0" svg:x="3.000in" svg:y="2.130in" svg:width="5.843in" svg:height="0.150in"/>
        <draw:frame draw:style-name="BCFrame" draw:name="row-status-0" svg:x="9.550in" svg:y="2.050in" svg:width="1.100in" svg:height="0.300in">
          <draw:text-box>
            <text:p text:style-name="BCStatus">完了</text:p>
          </draw:text-box>
        </draw:frame>
        <draw:frame draw:style-name="BCFrame" draw:name="row-label-1" svg:x="0.800in" svg:y="2.980in" svg:width="2.000in" svg:height="0.300in">
          <draw:text-box>
            <text:p text:style-name="BCBody">交流企画</text:p>
          </draw:text-box>
        </draw:frame>
        <draw:rect draw:style-name="BCTrack" draw:name="row-track-1" svg:x="3.000in" svg:y="3.060in" svg:width="6.150in" svg:height="0.150in"/>
        <draw:rect draw:style-name="BCCoral" draw:name="row-fill-1" svg:x="3.000in" svg:y="3.060in" svg:width="5.843in" svg:height="0.150in"/>
        <draw:frame draw:style-name="BCFrame" draw:name="row-status-1" svg:x="9.550in" svg:y="2.980in" svg:width="1.100in" svg:height="0.300in">
          <draw:text-box>
            <text:p text:style-name="BCStatus">完了</text:p>
          </draw:text-box>
        </draw:frame>
        <draw:frame draw:style-name="BCFrame" draw:name="row-label-2" svg:x="0.800in" svg:y="3.910in" svg:width="2.000in" svg:height="0.300in">
          <draw:text-box>
            <text:p text:style-name="BCBody">アンケート集計</text:p>
          </draw:text-box>
        </draw:frame>
        <draw:rect draw:style-name="BCTrack" draw:name="row-track-2" svg:x="3.000in" svg:y="3.990in" svg:width="6.150in" svg:height="0.150in"/>
        <draw:rect draw:style-name="BCCoral" draw:name="row-fill-2" svg:x="3.000in" svg:y="3.990in" svg:width="4.182in" svg:height="0.150in"/>
        <draw:frame draw:style-name="BCFrame" draw:name="row-status-2" svg:x="9.550in" svg:y="3.910in" svg:width="1.100in" svg:height="0.300in">
          <draw:text-box>
            <text:p text:style-name="BCStatus">対応中</text:p>
          </draw:text-box>
        </draw:frame>
        <draw:rect draw:style-name="BCWhite" draw:name="next-bg" svg:x="0.750in" svg:y="5.430in" svg:width="11.800in" svg:height="0.880in"/>
        <draw:rect draw:style-name="BCCoral" draw:name="next-accent" svg:x="0.750in" svg:y="5.430in" svg:width="0.080in" svg:height="0.880in"/>
        <draw:frame draw:style-name="BCFrame" draw:name="next" svg:x="1.100in" svg:y="5.720in" svg:width="7.400in" svg:height="0.320in">
          <draw:text-box>
            <text:p text:style-name="BCStatus">NEXT　受付導線と高齢者向け案内を改善する</text:p>
          </draw:text-box>
        </draw:frame>
        <draw:frame draw:style-name="BCFrame" draw:name="footer" svg:x="0.780in" svg:y="6.660in" svg:width="2.400in" svg:height="0.250in">
          <draw:text-box>
            <text:p text:style-name="BCSmall">地域交流会 実施報告</text:p>
          </draw:text-box>
        </draw:frame>
      </draw:page>
      <draw:page draw:name="bc-summary" draw:master-page-name="BCMaster" draw:style-name="BCPagebc-summary">
        <draw:frame draw:style-name="BCFrame" draw:name="organization-summary" svg:x="10.620in" svg:y="0.480in" svg:width="1.920in" svg:height="0.270in">
          <draw:text-box>
            <text:p text:style-name="BCOrganization">団体名</text:p>
          </draw:text-box>
        </draw:frame>
        <draw:frame draw:style-name="BCFrame" draw:name="summary-index" svg:x="0.750in" svg:y="0.470in" svg:width="1.150in" svg:height="0.620in">
          <draw:text-box>
            <text:p text:style-name="BCIndex">11</text:p>
          </draw:text-box>
        </draw:frame>
        <draw:frame draw:style-name="BCFrame" draw:name="summary-title" svg:x="1.650in" svg:y="0.610in" svg:width="6.200in" svg:height="0.480in">
          <draw:text-box>
            <text:p text:style-name="BCHeading">まとめ</text:p>
          </draw:text-box>
        </draw:frame>
        <draw:line draw:style-name="BCRule" draw:name="summary-rule" svg:x1="1.650in" svg:y1="1.350in" svg:x2="12.620in" svg:y2="1.350in"/>
        <draw:frame draw:style-name="BCFrame" draw:name="summary-lead" svg:x="0.820in" svg:y="2.030in" svg:width="6.650in" svg:height="1.320in">
          <draw:text-box>
            <text:p text:style-name="BCSummaryLead">交流の機会をつくるだけでなく、</text:p>
            <text:p text:style-name="BCSummaryLead">次につながる関係を残せた。</text:p>
          </draw:text-box>
        </draw:frame>
        <draw:frame draw:style-name="BCFrame" draw:name="summary-copy" svg:x="0.840in" svg:y="4.080in" svg:width="6.600in" svg:height="0.680in">
          <draw:text-box>
            <text:p text:style-name="BCBody">次回は受付導線と案内方法を改善し、初めて参加する人も入りやすい場をつくります。</text:p>
          </draw:text-box>
        </draw:frame>
        <draw:rect draw:style-name="BCWhite" draw:name="summary-next" svg:x="8.650in" svg:y="1.960in" svg:width="3.720in" svg:height="3.180in"/>
        <draw:rect draw:style-name="BCCoral" draw:name="summary-next-accent" svg:x="8.650in" svg:y="1.960in" svg:width="0.100in" svg:height="3.180in"/>
        <draw:frame draw:style-name="BCFrame" draw:name="summary-next-label" svg:x="9.050in" svg:y="2.380in" svg:width="1.800in" svg:height="0.280in">
          <draw:text-box>
            <text:p text:style-name="BCCoralSmall">NEXT ACTION</text:p>
          </draw:text-box>
        </draw:frame>
        <draw:frame draw:style-name="BCFrame" draw:name="summary-next-copy" svg:x="9.050in" svg:y="3.020in" svg:width="2.650in" svg:height="1.450in">
          <draw:text-box>
            <text:p text:style-name="BCBody">受付担当を増員</text:p>
            <text:p text:style-name="BCBody"/>
            <text:p text:style-name="BCBody">案内表示を改善</text:p>
            <text:p text:style-name="BCBody"/>
            <text:p text:style-name="BCBody">記録担当を事前決定</text:p>
          </draw:text-box>
        </draw:frame>
        <draw:frame draw:style-name="BCFrame" draw:name="summary-footer" svg:x="0.800in" svg:y="6.680in" svg:width="2.400in" svg:height="0.250in">
          <draw:text-box>
            <text:p text:style-name="BCSmall">地域交流会 実施報告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office:version="1.2">
  <office:font-face-decls>
    <style:font-face style:name="Noto Sans CJK JP" svg:font-family="'Noto Sans CJK JP'" style:font-family-generic="swiss" style:font-pitch="variable"/>
  </office:font-face-decls>
  <office:styles/>
  <office:automatic-styles>
    <style:page-layout style:name="Wide16x9">
      <style:page-layout-properties fo:page-width="13.333in" fo:page-height="7.500in" style:print-orientation="landscape" fo:margin-top="0in" fo:margin-right="0in" fo:margin-bottom="0in" fo:margin-left="0in"/>
    </style:page-layout>
  </office:automatic-styles>
  <office:master-styles>
    <style:master-page style:name="BCMaster" style:page-layout-name="Wide16x9" style:display-name="BCMaster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