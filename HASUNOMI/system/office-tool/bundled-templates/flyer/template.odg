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DEAD117A7D0A47B69913609257A450F6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Noto Sans CJK JP" svg:font-family="'Noto Sans CJK JP'" style:font-family-generic="swiss" style:font-pitch="variable"/>
  </office:font-face-decls>
  <office:automatic-styles>
    <style:style style:name="Frame" style:family="graphic" style:display-name="Frame">
      <style:graphic-properties draw:fill="none" draw:stroke="none"/>
    </style:style>
    <style:style style:name="WhiteFill" style:family="graphic" style:display-name="WhiteFill">
      <style:graphic-properties draw:fill="solid" draw:stroke="none" draw:fill-color="#FFFFFF"/>
    </style:style>
    <style:style style:name="CoralFill" style:family="graphic" style:display-name="CoralFill">
      <style:graphic-properties draw:fill="solid" draw:stroke="none" draw:fill-color="#C78A2C"/>
    </style:style>
    <style:style style:name="PaleFill" style:family="graphic" style:display-name="PaleFill">
      <style:graphic-properties draw:fill="solid" draw:stroke="none" draw:fill-color="#EEF2F0"/>
    </style:style>
    <style:style style:name="LightRule" style:family="graphic" style:display-name="LightRule">
      <style:graphic-properties draw:fill="none" draw:stroke="solid" svg:stroke-color="#D7DFDC" svg:stroke-width="0.7pt"/>
    </style:style>
    <style:style style:name="Kicker" style:family="paragraph" style:display-name="Kicker">
      <style:paragraph-properties fo:text-align="left" fo:margin-top="0in" fo:margin-bottom="0in" fo:line-height="120%"/>
      <style:text-properties style:font-name="Noto Sans CJK JP" style:font-name-asian="Noto Sans CJK JP" fo:font-family="'Noto Sans CJK JP'" style:font-family-asian="'Noto Sans CJK JP'" fo:font-size="8.5pt" style:font-size-asian="8.5pt" fo:font-weight="bold" style:font-weight-asian="bold" fo:color="#C78A2C" fo:language="ja" fo:country="JP" style:language-asian="ja" style:country-asian="JP"/>
    </style:style>
    <style:style style:name="Title" style:family="paragraph" style:display-name="Title">
      <style:paragraph-properties fo:text-align="left" fo:margin-top="0in" fo:margin-bottom="0in" fo:line-height="104%"/>
      <style:text-properties style:font-name="Noto Sans CJK JP" style:font-name-asian="Noto Sans CJK JP" fo:font-family="'Noto Sans CJK JP'" style:font-family-asian="'Noto Sans CJK JP'" fo:font-size="27pt" style:font-size-asian="27pt" fo:font-weight="bold" style:font-weight-asian="bold" fo:color="#23313D" fo:language="ja" fo:country="JP" style:language-asian="ja" style:country-asian="JP"/>
    </style:style>
    <style:style style:name="Lead" style:family="paragraph" style:display-name="Lead">
      <style:paragraph-properties fo:text-align="left" fo:margin-top="0in" fo:margin-bottom="0in" fo:line-height="150%"/>
      <style:text-properties style:font-name="Noto Sans CJK JP" style:font-name-asian="Noto Sans CJK JP" fo:font-family="'Noto Sans CJK JP'" style:font-family-asian="'Noto Sans CJK JP'" fo:font-size="11pt" style:font-size-asian="11pt" fo:font-weight="normal" style:font-weight-asian="normal" fo:color="#244A4A" fo:language="ja" fo:country="JP" style:language-asian="ja" style:country-asian="JP"/>
    </style:style>
    <style:style style:name="InfoLabel" style:family="paragraph" style:display-name="InfoLabel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7.5pt" style:font-size-asian="7.5pt" fo:font-weight="bold" style:font-weight-asian="bold" fo:color="#C78A2C" fo:language="ja" fo:country="JP" style:language-asian="ja" style:country-asian="JP"/>
    </style:style>
    <style:style style:name="InfoMain" style:family="paragraph" style:display-name="InfoMain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11pt" style:font-size-asian="11pt" fo:font-weight="bold" style:font-weight-asian="bold" fo:color="#23313D" fo:language="ja" fo:country="JP" style:language-asian="ja" style:country-asian="JP"/>
    </style:style>
    <style:style style:name="DateMain" style:family="paragraph" style:display-name="DateMain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18pt" style:font-size-asian="18pt" fo:font-weight="bold" style:font-weight-asian="bold" fo:color="#23313D" fo:language="ja" fo:country="JP" style:language-asian="ja" style:country-asian="JP"/>
    </style:style>
    <style:style style:name="DateTime" style:family="paragraph" style:display-name="DateTime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9.5pt" style:font-size-asian="9.5pt" fo:font-weight="bold" style:font-weight-asian="bold" fo:color="#244A4A" fo:language="ja" fo:country="JP" style:language-asian="ja" style:country-asian="JP"/>
    </style:style>
    <style:style style:name="CtaHead" style:family="paragraph" style:display-name="CtaHead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13pt" style:font-size-asian="13pt" fo:font-weight="bold" style:font-weight-asian="bold" fo:color="#23313D" fo:language="ja" fo:country="JP" style:language-asian="ja" style:country-asian="JP"/>
    </style:style>
    <style:style style:name="CtaBody" style:family="paragraph" style:display-name="CtaBody">
      <style:paragraph-properties fo:text-align="left" fo:margin-top="0in" fo:margin-bottom="0in" fo:line-height="145%"/>
      <style:text-properties style:font-name="Noto Sans CJK JP" style:font-name-asian="Noto Sans CJK JP" fo:font-family="'Noto Sans CJK JP'" style:font-family-asian="'Noto Sans CJK JP'" fo:font-size="8.5pt" style:font-size-asian="8.5pt" fo:font-weight="normal" style:font-weight-asian="normal" fo:color="#657078" fo:language="ja" fo:country="JP" style:language-asian="ja" style:country-asian="JP"/>
    </style:style>
    <style:style style:name="Qr" style:family="paragraph" style:display-name="Qr">
      <style:paragraph-properties fo:text-align="center" fo:margin-top="0in" fo:margin-bottom="0in" fo:line-height="125%"/>
      <style:text-properties style:font-name="Noto Sans CJK JP" style:font-name-asian="Noto Sans CJK JP" fo:font-family="'Noto Sans CJK JP'" style:font-family-asian="'Noto Sans CJK JP'" fo:font-size="7.5pt" style:font-size-asian="7.5pt" fo:font-weight="bold" style:font-weight-asian="bold" fo:color="#244A4A" fo:language="ja" fo:country="JP" style:language-asian="ja" style:country-asian="JP"/>
    </style:style>
    <style:style style:name="Small" style:family="paragraph" style:display-name="Small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7pt" style:font-size-asian="7pt" fo:font-weight="normal" style:font-weight-asian="normal" fo:color="#657078" fo:language="ja" fo:country="JP" style:language-asian="ja" style:country-asian="JP"/>
    </style:style>
  </office:automatic-styles>
  <office:body>
    <office:drawing>
      <draw:page draw:name="A4-flyer" draw:master-page-name="FlyerMaster" draw:style-name="WhiteFill">
        <draw:frame draw:style-name="Frame" draw:name="hero-photo" svg:x="0in" svg:y="0in" svg:width="8.2677in" svg:height="4.4000in">
          <draw:image xlink:href="Pictures/DEAD117A7D0A47B69913609257A450F6.jpg" xlink:type="simple" xlink:show="embed" xlink:actuate="onLoad"/>
        </draw:frame>
        <draw:frame draw:style-name="Frame" draw:name="kicker" svg:x="0.6200in" svg:y="4.7200in" svg:width="3.1000in" svg:height="0.2200in">
          <draw:text-box>
            <text:p text:style-name="Kicker">OPEN COMMUNITY DAY 2026</text:p>
          </draw:text-box>
        </draw:frame>
        <draw:frame draw:style-name="Frame" draw:name="title" svg:x="0.6000in" svg:y="5.0700in" svg:width="4.6500in" svg:height="0.9000in">
          <draw:text-box>
            <text:p text:style-name="Title">ひらく、つながる。</text:p>
            <text:p text:style-name="Title">夏の交流会</text:p>
          </draw:text-box>
        </draw:frame>
        <draw:rect draw:style-name="CoralFill" draw:name="date-accent" svg:x="5.6400in" svg:y="5.3600in" svg:width="0.0450in" svg:height="0.7800in"/>
        <draw:frame draw:style-name="Frame" draw:name="date-label" svg:x="5.8800in" svg:y="5.2500in" svg:width="0.9500in" svg:height="0.1700in">
          <draw:text-box>
            <text:p text:style-name="InfoLabel">開催日時</text:p>
          </draw:text-box>
        </draw:frame>
        <draw:frame draw:style-name="Frame" draw:name="date-main" svg:x="5.8700in" svg:y="5.4900in" svg:width="1.5500in" svg:height="0.3400in">
          <draw:text-box>
            <text:p text:style-name="DateMain">8.22（土）</text:p>
          </draw:text-box>
        </draw:frame>
        <draw:frame draw:style-name="Frame" draw:name="date-time" svg:x="5.8800in" svg:y="5.8800in" svg:width="1.3500in" svg:height="0.2000in">
          <draw:text-box>
            <text:p text:style-name="DateTime">13:30–16:00</text:p>
          </draw:text-box>
        </draw:frame>
        <draw:frame draw:style-name="Frame" draw:name="lead" svg:x="0.6200in" svg:y="6.4300in" svg:width="6.9200in" svg:height="0.5800in">
          <draw:text-box>
            <text:p text:style-name="Lead">はじめての方も、久しぶりの方も。地域で顔を合わせ、話し、楽しむ一日です。途中参加・途中退出もできます。</text:p>
          </draw:text-box>
        </draw:frame>
        <draw:line draw:style-name="LightRule" draw:name="facts-top" svg:x1="0.6200in" svg:y1="7.3800in" svg:x2="7.6400in" svg:y2="7.3800in"/>
        <draw:line draw:style-name="LightRule" draw:name="facts-bottom" svg:x1="0.6200in" svg:y1="9.2800in" svg:x2="7.6400in" svg:y2="9.2800in"/>
        <draw:line draw:style-name="LightRule" draw:name="facts-separator-1" svg:x1="2.7600in" svg:y1="7.7000in" svg:x2="2.7600in" svg:y2="8.9400in"/>
        <draw:line draw:style-name="LightRule" draw:name="facts-separator-2" svg:x1="5.0600in" svg:y1="7.7000in" svg:x2="5.0600in" svg:y2="8.9400in"/>
        <draw:frame draw:style-name="Frame" draw:name="place-label" svg:x="0.6200in" svg:y="7.8200in" svg:width="0.6500in" svg:height="0.1700in">
          <draw:text-box>
            <text:p text:style-name="InfoLabel">会場</text:p>
          </draw:text-box>
        </draw:frame>
        <draw:frame draw:style-name="Frame" draw:name="place-main" svg:x="0.6200in" svg:y="8.1400in" svg:width="1.9000in" svg:height="0.4200in">
          <draw:text-box>
            <text:p text:style-name="InfoMain">みどり市民会館</text:p>
            <text:p text:style-name="InfoMain">1階交流ホール</text:p>
          </draw:text-box>
        </draw:frame>
        <draw:frame draw:style-name="Frame" draw:name="guide-label" svg:x="3.0000in" svg:y="7.8200in" svg:width="0.6500in" svg:height="0.1700in">
          <draw:text-box>
            <text:p text:style-name="InfoLabel">内容</text:p>
          </draw:text-box>
        </draw:frame>
        <draw:frame draw:style-name="Frame" draw:name="guide-main" svg:x="3.0000in" svg:y="8.1400in" svg:width="1.8200in" svg:height="0.4200in">
          <draw:text-box>
            <text:p text:style-name="InfoMain">交流・ミニ体験</text:p>
            <text:p text:style-name="InfoMain">地域活動の紹介</text:p>
          </draw:text-box>
        </draw:frame>
        <draw:frame draw:style-name="Frame" draw:name="fee-label" svg:x="5.3000in" svg:y="7.8200in" svg:width="1.1500in" svg:height="0.1700in">
          <draw:text-box>
            <text:p text:style-name="InfoLabel">参加について</text:p>
          </draw:text-box>
        </draw:frame>
        <draw:frame draw:style-name="Frame" draw:name="fee-main" svg:x="5.3000in" svg:y="8.1400in" svg:width="2.1800in" svg:height="0.4200in">
          <draw:text-box>
            <text:p text:style-name="InfoMain">参加無料・申込優先</text:p>
            <text:p text:style-name="InfoMain">どなたでも参加できます</text:p>
          </draw:text-box>
        </draw:frame>
        <draw:rect draw:style-name="PaleFill" draw:name="entry-band" svg:x="0.6200in" svg:y="9.4300in" svg:width="7.0200in" svg:height="1.3000in"/>
        <draw:rect draw:style-name="CoralFill" draw:name="entry-accent" svg:x="0.6200in" svg:y="9.4300in" svg:width="0.0550in" svg:height="1.3000in"/>
        <draw:frame draw:style-name="Frame" draw:name="cta-head" svg:x="0.9200in" svg:y="9.6600in" svg:width="3.1000in" svg:height="0.3000in">
          <draw:text-box>
            <text:p text:style-name="CtaHead">参加申込み・お問い合わせ</text:p>
          </draw:text-box>
        </draw:frame>
        <draw:frame draw:style-name="Frame" draw:name="cta-body" svg:x="0.9200in" svg:y="10.0300in" svg:width="4.8600in" svg:height="0.4600in">
          <draw:text-box>
            <text:p text:style-name="CtaBody">申込締切：8月18日（火）。電話または申込フォームからお申し込みください。</text:p>
            <text:p text:style-name="CtaBody">TEL 000-0000-0000　　info@example.jp</text:p>
          </draw:text-box>
        </draw:frame>
        <draw:rect draw:style-name="WhiteFill" draw:name="qr-placeholder" svg:x="6.3400in" svg:y="9.6300in" svg:width="0.9000in" svg:height="0.9000in"/>
        <draw:frame draw:style-name="Frame" draw:name="qr-label" svg:x="6.4100in" svg:y="9.8800in" svg:width="0.7600in" svg:height="0.3400in">
          <draw:text-box>
            <text:p text:style-name="Qr">申込</text:p>
            <text:p text:style-name="Qr">フォーム</text:p>
          </draw:text-box>
        </draw:frame>
        <draw:line draw:style-name="LightRule" draw:name="footer-rule" svg:x1="0.6200in" svg:y1="10.8900in" svg:x2="7.6400in" svg:y2="10.8900in"/>
        <draw:frame draw:style-name="Frame" draw:name="footer-left" svg:x="0.6200in" svg:y="11.0800in" svg:width="2.5000in" svg:height="0.1800in">
          <draw:text-box>
            <text:p text:style-name="Small">主催・運営　みどりの輪</text:p>
          </draw:text-box>
        </draw:frame>
        <draw:frame draw:style-name="Frame" draw:name="footer-right" svg:x="4.6600in" svg:y="11.0800in" svg:width="2.9800in" svg:height="0.1800in">
          <draw:text-box>
            <text:p text:style-name="Small">写真：Wikimedia Commons / Public Dom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office:version="1.2">
  <office:font-face-decls>
    <style:font-face style:name="Noto Sans CJK JP" svg:font-family="'Noto Sans CJK JP'" style:font-family-generic="swiss" style:font-pitch="variable"/>
  </office:font-face-decls>
  <office:styles/>
  <office:automatic-styles>
    <style:page-layout style:name="A4Portrait">
      <style:page-layout-properties fo:page-width="8.2677in" fo:page-height="11.6929in" style:print-orientation="portrait" fo:margin-top="0in" fo:margin-right="0in" fo:margin-bottom="0in" fo:margin-left="0in"/>
    </style:page-layout>
  </office:automatic-styles>
  <office:master-styles>
    <style:master-page style:name="FlyerMaster" style:page-layout-name="A4Portrait" style:display-name="Flyer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